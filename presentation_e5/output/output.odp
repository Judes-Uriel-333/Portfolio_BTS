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ptos" svg:font-family="Aptos"/>
    <style:font-face style:name="Arial" svg:font-family="Arial" style:font-family-generic="system" style:font-pitch="variable"/>
    <style:font-face style:name="Bahnschrift" svg:font-family="Bahnschrift"/>
    <style:font-face style:name="Calibri" svg:font-family="Calibri"/>
    <style:font-face style:name="Cascadia Code" svg:font-family="'Cascadia Cod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8faf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cm" svg:stroke-color="#1e293b" draw:fill="solid" draw:fill-color="#1e293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solid" svg:stroke-width="0cm" svg:stroke-color="#0891b2" draw:fill="solid" draw:fill-color="#0891b2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" style:family="graphic" style:parent-style-name="standard">
      <style:graphic-properties draw:stroke="solid" svg:stroke-width="0cm" svg:stroke-color="#047857" draw:fill="solid" draw:fill-color="#047857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9" style:family="graphic" style:parent-style-name="standard">
      <style:graphic-properties draw:stroke="solid" svg:stroke-width="0cm" svg:stroke-color="#b45309" draw:fill="solid" draw:fill-color="#b45309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" style:family="graphic" style:parent-style-name="standard">
      <style:graphic-properties draw:stroke="solid" svg:stroke-width="0.026cm" svg:stroke-color="#cbd5e1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pr1" style:family="presentation" style:parent-style-name="Title_20_Slide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2" style:family="presentation" style:parent-style-name="Title_20_Slide-backgroundobject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3" style:family="presentation" style:parent-style-name="Title_20_Slide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4" style:family="presentation" style:parent-style-name="Title_20_Slide-backgroundobject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5" style:family="presentation" style:parent-style-name="Title_20_Slide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6" style:family="presentation" style:parent-style-name="Title_20_Slide-backgroundobject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7" style:family="presentation" style:parent-style-name="Title_20_Slide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8" style:family="presentation" style:parent-style-name="Title_20_Slide-backgroundobject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9" style:family="presentation" style:parent-style-name="Title_20_Slide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10" style:family="presentation" style:parent-style-name="Title_20_Slide-backgroundobject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11" style:family="presentation" style:parent-style-name="Title_20_Slide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12" style:family="presentation" style:parent-style-name="Title_20_Slide-backgroundobject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13" style:family="presentation" style:parent-style-name="Title_20_Slide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14" style:family="presentation" style:parent-style-name="Title_20_Slide-backgroundobject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15" style:family="presentation" style:parent-style-name="Title_20_Slide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16" style:family="presentation" style:parent-style-name="Title_20_Slide-backgroundobject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17" style:family="presentation" style:parent-style-name="Title_20_Slide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18" style:family="presentation" style:parent-style-name="Title_20_Slide-backgroundobject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19" style:family="presentation" style:parent-style-name="Title_20_Slide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20" style:family="presentation" style:parent-style-name="Title_20_Slide-backgroundobject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1" style:family="paragraph">
      <loext:graphic-properties draw:fill="solid" draw:fill-color="#1e293b"/>
      <style:paragraph-properties fo:text-align="start"/>
      <style:text-properties fo:font-size="18pt"/>
    </style:style>
    <style:style style:name="P2" style:family="paragraph">
      <loext:graphic-properties draw:fill="solid" draw:fill-color="#0891b2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style:paragraph-properties fo:margin-left="0cm" fo:margin-right="0cm" fo:margin-top="0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2.54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7" style:family="paragraph">
      <style:paragraph-properties fo:margin-left="0cm" fo:margin-right="0cm" fo:margin-top="0cm" fo:margin-bottom="0cm" fo:line-height="122%" fo:text-align="start" fo:text-indent="0cm" loext:tab-stop-distance="2.54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22%" fo:text-align="start" fo:text-indent="0cm" loext:tab-stop-distance="2.54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loext:tab-stop-distance="2.54cm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2.54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96%" fo:text-align="start" fo:text-indent="0cm" loext:tab-stop-distance="2.54cm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96%" fo:text-align="start" fo:text-indent="0cm" loext:tab-stop-distance="2.54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5" style:family="paragraph">
      <style:paragraph-properties fo:margin-left="0cm" fo:margin-right="0cm" fo:margin-top="0cm" fo:margin-bottom="0cm" fo:line-height="112%" fo:text-align="start" fo:text-indent="0cm" loext:tab-stop-distance="2.54cm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12%" fo:text-align="start" fo:text-indent="0cm" loext:tab-stop-distance="2.54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7" style:family="paragraph">
      <style:paragraph-properties fo:margin-left="0cm" fo:margin-right="0cm" fo:margin-top="0cm" fo:margin-bottom="0cm" fo:line-height="108%" fo:text-align="start" fo:text-indent="0cm" loext:tab-stop-distance="2.54cm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08%" fo:text-align="start" fo:text-indent="0cm" loext:tab-stop-distance="2.54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9" style:family="paragraph">
      <loext:graphic-properties draw:fill="solid" draw:fill-color="#047857"/>
      <style:paragraph-properties fo:text-align="start"/>
      <style:text-properties fo:font-size="18pt"/>
    </style:style>
    <style:style style:name="P20" style:family="paragraph">
      <loext:graphic-properties draw:fill="solid" draw:fill-color="#b45309"/>
      <style:paragraph-properties fo:text-align="start"/>
      <style:text-properties fo:font-size="18pt"/>
    </style:style>
    <style:style style:name="P21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891b2" loext:opacity="100%" style:text-outline="false" style:text-line-through-style="none" style:text-line-through-type="none" style:text-position="0% 100%" style:font-name="Cascadia Code" fo:font-size="16.5pt" fo:letter-spacing="normal" fo:language="en" fo:country="US" fo:font-style="normal" style:text-underline-style="none" fo:font-weight="bold" fo:background-color="transparent" style:font-name-asian="Cascadia Code" style:font-size-asian="16.5pt" style:font-style-asian="normal" style:font-weight-asian="bold" style:font-name-complex="Cascadia Code" style:font-size-complex="16.5pt" style:font-style-complex="normal" style:font-weight-complex="bold"/>
    </style:style>
    <style:style style:name="T2" style:family="text">
      <style:text-properties fo:font-variant="normal" fo:text-transform="none" fo:color="#0f172a" loext:opacity="100%" style:text-outline="false" style:text-line-through-style="none" style:text-line-through-type="none" style:text-position="0% 100%" style:font-name="Bahnschrift" fo:font-size="66pt" fo:letter-spacing="normal" fo:language="en" fo:country="US" fo:font-style="normal" style:text-underline-style="none" fo:font-weight="bold" fo:background-color="transparent" style:font-name-asian="Bahnschrift" style:font-size-asian="66pt" style:font-style-asian="normal" style:font-weight-asian="bold" style:font-name-complex="Bahnschrift" style:font-size-complex="66pt" style:font-style-complex="normal" style:font-weight-complex="bold"/>
    </style:style>
    <style:style style:name="T3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Aptos" fo:font-size="22.5pt" fo:letter-spacing="normal" fo:language="en" fo:country="US" fo:font-style="normal" style:text-underline-style="none" fo:font-weight="normal" fo:background-color="transparent" style:font-name-asian="Aptos" style:font-size-asian="22.5pt" style:font-style-asian="normal" style:font-weight-asian="normal" style:font-name-complex="Aptos" style:font-size-complex="22.5pt" style:font-style-complex="normal" style:font-weight-complex="normal"/>
    </style:style>
    <style:style style:name="T4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scadia Code" fo:font-size="12pt" fo:letter-spacing="normal" fo:language="en" fo:country="US" fo:font-style="normal" style:text-underline-style="none" fo:font-weight="normal" fo:background-color="transparent" style:font-name-asian="Cascadia Code" style:font-size-asian="12pt" style:font-style-asian="normal" style:font-weight-asian="normal" style:font-name-complex="Cascadia Code" style:font-size-complex="12pt" style:font-style-complex="normal" style:font-weight-complex="normal"/>
    </style:style>
    <style:style style:name="T5" style:family="text">
      <style:text-properties fo:font-variant="normal" fo:text-transform="none" fo:color="#0891b2" loext:opacity="100%" style:text-outline="false" style:text-line-through-style="none" style:text-line-through-type="none" style:text-position="0% 100%" style:font-name="Cascadia Code" fo:font-size="13.5pt" fo:letter-spacing="normal" fo:language="en" fo:country="US" fo:font-style="normal" style:text-underline-style="none" fo:font-weight="bold" fo:background-color="transparent" style:font-name-asian="Cascadia Code" style:font-size-asian="13.5pt" style:font-style-asian="normal" style:font-weight-asian="bold" style:font-name-complex="Cascadia Code" style:font-size-complex="13.5pt" style:font-style-complex="normal" style:font-weight-complex="bold"/>
    </style:style>
    <style:style style:name="T6" style:family="text">
      <style:text-properties fo:font-variant="normal" fo:text-transform="none" fo:color="#0f172a" loext:opacity="100%" style:text-outline="false" style:text-line-through-style="none" style:text-line-through-type="none" style:text-position="0% 100%" style:font-name="Bahnschrift" fo:font-size="43.5pt" fo:letter-spacing="normal" fo:language="en" fo:country="US" fo:font-style="normal" style:text-underline-style="none" fo:font-weight="bold" fo:background-color="transparent" style:font-name-asian="Bahnschrift" style:font-size-asian="43.5pt" style:font-style-asian="normal" style:font-weight-asian="bold" style:font-name-complex="Bahnschrift" style:font-size-complex="43.5pt" style:font-style-complex="normal" style:font-weight-complex="bold"/>
    </style:style>
    <style:style style:name="T7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Aptos" fo:font-size="18.7000007629395pt" fo:letter-spacing="normal" fo:language="en" fo:country="US" fo:font-style="normal" style:text-underline-style="none" fo:font-weight="normal" fo:background-color="transparent" style:font-name-asian="Aptos" style:font-size-asian="18.7000007629395pt" style:font-style-asian="normal" style:font-weight-asian="normal" style:font-name-complex="Aptos" style:font-size-complex="18.7000007629395pt" style:font-style-complex="normal" style:font-weight-complex="normal"/>
    </style:style>
    <style:style style:name="T8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Aptos" fo:font-size="27pt" fo:letter-spacing="normal" fo:language="en" fo:country="US" fo:font-style="normal" style:text-underline-style="none" fo:font-weight="normal" fo:background-color="transparent" style:font-name-asian="Aptos" style:font-size-asian="27pt" style:font-style-asian="normal" style:font-weight-asian="normal" style:font-name-complex="Aptos" style:font-size-complex="27pt" style:font-style-complex="normal" style:font-weight-complex="normal"/>
    </style:style>
    <style:style style:name="T9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Aptos" fo:font-size="21pt" fo:letter-spacing="normal" fo:language="en" fo:country="US" fo:font-style="italic" style:text-underline-style="none" fo:font-weight="normal" fo:background-color="transparent" style:font-name-asian="Aptos" style:font-size-asian="21pt" style:font-style-asian="italic" style:font-weight-asian="normal" style:font-name-complex="Aptos" style:font-size-complex="21pt" style:font-style-complex="italic" style:font-weight-complex="normal"/>
    </style:style>
    <style:style style:name="T10" style:family="text">
      <style:text-properties fo:font-variant="normal" fo:text-transform="none" fo:color="#047857" loext:opacity="100%" style:text-outline="false" style:text-line-through-style="none" style:text-line-through-type="none" style:text-position="0% 100%" style:font-name="Cascadia Code" fo:font-size="13.5pt" fo:letter-spacing="normal" fo:language="en" fo:country="US" fo:font-style="normal" style:text-underline-style="none" fo:font-weight="bold" fo:background-color="transparent" style:font-name-asian="Cascadia Code" style:font-size-asian="13.5pt" style:font-style-asian="normal" style:font-weight-asian="bold" style:font-name-complex="Cascadia Code" style:font-size-complex="13.5pt" style:font-style-complex="normal" style:font-weight-complex="bold"/>
    </style:style>
    <style:style style:name="T11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Aptos" fo:font-size="26.2000007629395pt" fo:letter-spacing="normal" fo:language="en" fo:country="US" fo:font-style="normal" style:text-underline-style="none" fo:font-weight="normal" fo:background-color="transparent" style:font-name-asian="Aptos" style:font-size-asian="26.2000007629395pt" style:font-style-asian="normal" style:font-weight-asian="normal" style:font-name-complex="Aptos" style:font-size-complex="26.2000007629395pt" style:font-style-complex="normal" style:font-weight-complex="normal"/>
    </style:style>
    <style:style style:name="T12" style:family="text">
      <style:text-properties fo:font-variant="normal" fo:text-transform="none" fo:color="#b45309" loext:opacity="100%" style:text-outline="false" style:text-line-through-style="none" style:text-line-through-type="none" style:text-position="0% 100%" style:font-name="Cascadia Code" fo:font-size="13.5pt" fo:letter-spacing="normal" fo:language="en" fo:country="US" fo:font-style="normal" style:text-underline-style="none" fo:font-weight="bold" fo:background-color="transparent" style:font-name-asian="Cascadia Code" style:font-size-asian="13.5pt" style:font-style-asian="normal" style:font-weight-asian="bold" style:font-name-complex="Cascadia Code" style:font-size-complex="13.5pt" style:font-style-complex="normal" style:font-weight-complex="bold"/>
    </style:style>
    <style:style style:name="T13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scadia Code" fo:font-size="15pt" fo:letter-spacing="normal" fo:language="en" fo:country="US" fo:font-style="normal" style:text-underline-style="none" fo:font-weight="bold" fo:background-color="transparent" style:font-name-asian="Cascadia Code" style:font-size-asian="15pt" style:font-style-asian="normal" style:font-weight-asian="bold" style:font-name-complex="Cascadia Code" style:font-size-complex="15pt" style:font-style-complex="normal" style:font-weight-complex="bold"/>
    </style:style>
    <style:style style:name="T14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Aptos" fo:font-size="22.5pt" fo:letter-spacing="normal" fo:language="en" fo:country="US" fo:font-style="normal" style:text-underline-style="none" fo:font-weight="normal" fo:background-color="transparent" style:font-name-asian="Aptos" style:font-size-asian="22.5pt" style:font-style-asian="normal" style:font-weight-asian="normal" style:font-name-complex="Aptos" style:font-size-complex="22.5pt" style:font-style-complex="normal" style:font-weight-complex="normal"/>
    </style:style>
    <style:style style:name="T15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Aptos" fo:font-size="25.5pt" fo:letter-spacing="normal" fo:language="en" fo:country="US" fo:font-style="normal" style:text-underline-style="none" fo:font-weight="normal" fo:background-color="transparent" style:font-name-asian="Aptos" style:font-size-asian="25.5pt" style:font-style-asian="normal" style:font-weight-asian="normal" style:font-name-complex="Aptos" style:font-size-complex="25.5pt" style:font-style-complex="normal" style:font-weight-complex="normal"/>
    </style:style>
    <style:style style:name="T16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Aptos" fo:font-size="21.7000007629395pt" fo:letter-spacing="normal" fo:language="en" fo:country="US" fo:font-style="normal" style:text-underline-style="none" fo:font-weight="normal" fo:background-color="transparent" style:font-name-asian="Aptos" style:font-size-asian="21.7000007629395pt" style:font-style-asian="normal" style:font-weight-asian="normal" style:font-name-complex="Aptos" style:font-size-complex="21.7000007629395pt" style:font-style-complex="normal" style:font-weight-complex="normal"/>
    </style:style>
    <style:style style:name="T17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Aptos" fo:font-size="23.2000007629395pt" fo:letter-spacing="normal" fo:language="en" fo:country="US" fo:font-style="normal" style:text-underline-style="none" fo:font-weight="normal" fo:background-color="transparent" style:font-name-asian="Aptos" style:font-size-asian="23.2000007629395pt" style:font-style-asian="normal" style:font-weight-asian="normal" style:font-name-complex="Aptos" style:font-size-complex="23.2000007629395pt" style:font-style-complex="normal" style:font-weight-complex="normal"/>
    </style:style>
    <style:style style:name="T18" style:family="text">
      <style:text-properties fo:font-variant="normal" fo:text-transform="none" fo:color="#0f172a" loext:opacity="100%" style:text-outline="false" style:text-line-through-style="none" style:text-line-through-type="none" style:text-position="0% 100%" style:font-name="Bahnschrift" fo:font-size="25.5pt" fo:letter-spacing="normal" fo:language="en" fo:country="US" fo:font-style="normal" style:text-underline-style="none" fo:font-weight="bold" fo:background-color="transparent" style:font-name-asian="Bahnschrift" style:font-size-asian="25.5pt" style:font-style-asian="normal" style:font-weight-asian="bold" style:font-name-complex="Bahnschrift" style:font-size-complex="25.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891b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f17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7556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6474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1e29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047857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b4530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0f172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cover-top-rule" draw:style-name="gr1" draw:text-style-name="P1" draw:layer="layout" svg:width="50.799cm" svg:height="0.47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ver-side-accent" draw:style-name="gr2" draw:text-style-name="P2" draw:layer="layout" svg:width="1.534cm" svg:height="28.574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ver-eyebrow" draw:style-name="gr3" draw:text-style-name="P4" draw:layer="layout" svg:width="43.814cm" svg:height="0.74cm" svg:x="3.493cm" svg:y="6.297cm">
          <text:p text:style-name="P3"><text:span text:style-name="T1">Support de suivi pour le jur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ver-title" draw:style-name="gr4" draw:text-style-name="P6" draw:layer="layout" svg:width="16.562cm" svg:height="7.566cm" svg:x="3.493cm" svg:y="7.673cm">
          <text:p text:style-name="P5"><text:span text:style-name="T2">Présentation E5</text:span></text:p>
          <text:p text:style-name="P5"><text:span text:style-name="T2">BTS SIO SLA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ver-rule" draw:style-name="gr2" draw:text-style-name="P2" draw:layer="layout" svg:width="8.201cm" svg:height="0.158cm" svg:x="3.493cm" svg:y="15.8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ver-identity" draw:style-name="gr5" draw:text-style-name="P8" draw:layer="layout" svg:width="12.011cm" svg:height="3.492cm" svg:x="3.493cm" svg:y="16.722cm">
          <text:p text:style-name="P7"><text:span text:style-name="T3">Angoran Moyé Judes-Uriel Stéphanas</text:span></text:p>
          <text:p text:style-name="P7"><text:span text:style-name="T3">Institut F2I - Session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-left" draw:style-name="gr6" draw:text-style-name="P4" draw:layer="layout" svg:width="15.398cm" svg:height="1.057cm" svg:x="3.493cm" svg:y="25.347cm">
          <text:p text:style-name="P3"><text:span text:style-name="T4">Support jury - Épreuve E5 | Angoran Moyé Judes-Uriel Stéphan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-right" draw:style-name="gr7" draw:text-style-name="P10" draw:layer="layout" svg:width="1.745cm" svg:height="1.057cm" svg:x="45.561cm" svg:y="25.347cm">
          <text:p text:style-name="P9"><text:span text:style-name="T4">01 / 1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0cm" svg:height="0cm" svg:x="0cm" svg:y="0cm" draw:page-number="1" presentation:class="page"/>
          <draw:frame draw:name="Notes Placeholder 2" presentation:style-name="pr1" draw:text-style-name="P11" draw:layer="layout" svg:width="0cm" svg:height="0cm" svg:x="0cm" svg:y="0cm" presentation:class="notes" presentation:placeholder="true">
            <draw:text-box/>
          </draw:frame>
          <draw:frame draw:name="Slide Number Placeholder 3" presentation:style-name="pr2" draw:text-style-name="P12" draw:layer="layout" svg:width="0cm" svg:height="0cm" svg:x="0cm" svg:y="0cm" presentation:class="page-number">
            <draw:text-box>
              <text:p/>
            </draw:text-box>
          </draw:frame>
        </presentation:notes>
      </draw:page>
      <draw:page draw:name="page2" draw:style-name="dp1" draw:master-page-name="Title_20_Slide" presentation:presentation-page-layout-name="AL1T0">
        <draw:custom-shape draw:name="print-accent-side" draw:style-name="gr2" draw:text-style-name="P2" draw:layer="layout" svg:width="0.899cm" svg:height="28.574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int-top-rule" draw:style-name="gr1" draw:text-style-name="P1" draw:layer="layout" svg:width="50.799cm" svg:height="0.31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yebrow" draw:style-name="gr9" draw:text-style-name="P4" draw:layer="layout" svg:width="44.978cm" svg:height="0.581cm" svg:x="2.91cm" svg:y="1.799cm">
          <text:p text:style-name="P3"><text:span text:style-name="T5">Présentation E5 - BTS SIO SLA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-title" draw:style-name="gr10" draw:text-style-name="P14" draw:layer="layout" svg:width="44.978cm" svg:height="1.798cm" svg:x="2.91cm" svg:y="2.805cm">
          <text:p text:style-name="P13"><text:span text:style-name="T6">Fil conducteu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-subtitle" draw:style-name="gr11" draw:text-style-name="P16" draw:layer="layout" svg:width="21.748cm" svg:height="1.798cm" svg:x="2.91cm" svg:y="4.974cm">
          <text:p text:style-name="P15"><text:span text:style-name="T7">Une lecture simple du parcours : bases, projets, professionnalisation, orientatio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0" draw:style-name="gr2" draw:text-style-name="P2" draw:layer="layout" svg:width="0.369cm" svg:height="0.369cm" svg:x="2.91cm" svg:y="12.06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0" draw:style-name="gr12" draw:text-style-name="P18" draw:layer="layout" svg:width="44.132cm" svg:height="1.269cm" svg:x="3.757cm" svg:y="12.065cm">
          <text:p text:style-name="P17"><text:span text:style-name="T8">Profil personnel et manière de progress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1" draw:style-name="gr2" draw:text-style-name="P2" draw:layer="layout" svg:width="0.369cm" svg:height="0.369cm" svg:x="2.91cm" svg:y="13.91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1" draw:style-name="gr13" draw:text-style-name="P18" draw:layer="layout" svg:width="44.132cm" svg:height="1.269cm" svg:x="3.757cm" svg:y="13.917cm">
          <text:p text:style-name="P17"><text:span text:style-name="T8">Parcours scolaire et méthode de travai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2" draw:style-name="gr2" draw:text-style-name="P2" draw:layer="layout" svg:width="0.369cm" svg:height="0.369cm" svg:x="2.91cm" svg:y="15.71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2" draw:style-name="gr14" draw:text-style-name="P18" draw:layer="layout" svg:width="44.132cm" svg:height="1.269cm" svg:x="3.757cm" svg:y="15.716cm">
          <text:p text:style-name="P17"><text:span text:style-name="T8">Stages, projets et compétences mobilisé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3" draw:style-name="gr2" draw:text-style-name="P2" draw:layer="layout" svg:width="0.369cm" svg:height="0.369cm" svg:x="2.91cm" svg:y="17.51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3" draw:style-name="gr15" draw:text-style-name="P18" draw:layer="layout" svg:width="44.132cm" svg:height="1.269cm" svg:x="3.757cm" svg:y="17.515cm">
          <text:p text:style-name="P17"><text:span text:style-name="T8">Certifications, veille technologique et suite du parcour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-bottom-note" draw:style-name="gr16" draw:text-style-name="P4" draw:layer="layout" svg:width="16.879cm" svg:height="0.899cm" svg:x="2.91cm" svg:y="19.579cm">
          <text:p text:style-name="P3"><text:span text:style-name="T9">Objectif : mettre en évidence une progression cohérent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-left" draw:style-name="gr17" draw:text-style-name="P4" draw:layer="layout" svg:width="15.398cm" svg:height="1.057cm" svg:x="2.91cm" svg:y="25.718cm">
          <text:p text:style-name="P3"><text:span text:style-name="T4">Support jury - Épreuve E5 | Angoran Moyé Judes-Uriel Stéphan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-right" draw:style-name="gr18" draw:text-style-name="P10" draw:layer="layout" svg:width="1.745cm" svg:height="1.057cm" svg:x="46.143cm" svg:y="25.718cm">
          <text:p text:style-name="P9"><text:span text:style-name="T4">02 / 1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0cm" svg:height="0cm" svg:x="0cm" svg:y="0cm" draw:page-number="2" presentation:class="page"/>
          <draw:frame draw:name="Notes Placeholder 2" presentation:style-name="pr3" draw:text-style-name="P11" draw:layer="layout" svg:width="0cm" svg:height="0cm" svg:x="0cm" svg:y="0cm" presentation:class="notes" presentation:placeholder="true">
            <draw:text-box/>
          </draw:frame>
          <draw:frame draw:name="Slide Number Placeholder 3" presentation:style-name="pr4" draw:text-style-name="P12" draw:layer="layout" svg:width="0cm" svg:height="0cm" svg:x="0cm" svg:y="0cm" presentation:class="page-number">
            <draw:text-box>
              <text:p/>
            </draw:text-box>
          </draw:frame>
        </presentation:notes>
      </draw:page>
      <draw:page draw:name="page3" draw:style-name="dp1" draw:master-page-name="Title_20_Slide" presentation:presentation-page-layout-name="AL1T0">
        <draw:custom-shape draw:name="print-accent-side" draw:style-name="gr19" draw:text-style-name="P19" draw:layer="layout" svg:width="0.899cm" svg:height="28.574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int-top-rule" draw:style-name="gr1" draw:text-style-name="P1" draw:layer="layout" svg:width="50.799cm" svg:height="0.31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yebrow" draw:style-name="gr20" draw:text-style-name="P4" draw:layer="layout" svg:width="44.978cm" svg:height="0.581cm" svg:x="2.91cm" svg:y="1.799cm">
          <text:p text:style-name="P3"><text:span text:style-name="T10">Présentation E5 - BTS SIO SLA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-title" draw:style-name="gr21" draw:text-style-name="P14" draw:layer="layout" svg:width="44.978cm" svg:height="1.798cm" svg:x="2.91cm" svg:y="2.805cm">
          <text:p text:style-name="P13"><text:span text:style-name="T6">Profil personn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-subtitle" draw:style-name="gr22" draw:text-style-name="P16" draw:layer="layout" svg:width="21.113cm" svg:height="0.899cm" svg:x="2.91cm" svg:y="4.974cm">
          <text:p text:style-name="P15"><text:span text:style-name="T7">Un profil en construction sérieuse, centré sur la compréhension et la structur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0" draw:style-name="gr19" draw:text-style-name="P19" draw:layer="layout" svg:width="0.369cm" svg:height="0.369cm" svg:x="2.91cm" svg:y="6.87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0" draw:style-name="gr23" draw:text-style-name="P18" draw:layer="layout" svg:width="44.132cm" svg:height="1.216cm" svg:x="3.757cm" svg:y="6.879cm">
          <text:p text:style-name="P17"><text:span text:style-name="T11">Comprendre les fondations avant d’aller vers des sujets plus complex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1" draw:style-name="gr19" draw:text-style-name="P19" draw:layer="layout" svg:width="0.369cm" svg:height="0.369cm" svg:x="2.91cm" svg:y="8.67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1" draw:style-name="gr24" draw:text-style-name="P18" draw:layer="layout" svg:width="44.132cm" svg:height="1.216cm" svg:x="3.757cm" svg:y="8.678cm">
          <text:p text:style-name="P17"><text:span text:style-name="T11">Relier besoin, code, données et maintenabilit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2" draw:style-name="gr19" draw:text-style-name="P19" draw:layer="layout" svg:width="0.369cm" svg:height="0.369cm" svg:x="2.91cm" svg:y="10.42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2" draw:style-name="gr25" draw:text-style-name="P18" draw:layer="layout" svg:width="44.132cm" svg:height="1.216cm" svg:x="3.757cm" svg:y="10.425cm">
          <text:p text:style-name="P17"><text:span text:style-name="T11">Construire des solutions utiles, lisibles et évolutiv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3" draw:style-name="gr19" draw:text-style-name="P19" draw:layer="layout" svg:width="0.369cm" svg:height="0.369cm" svg:x="2.91cm" svg:y="12.224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3" draw:style-name="gr26" draw:text-style-name="P18" draw:layer="layout" svg:width="44.132cm" svg:height="1.216cm" svg:x="3.757cm" svg:y="12.224cm">
          <text:p text:style-name="P17"><text:span text:style-name="T11">Présenter les projets avec transparence sur leur maturit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-left" draw:style-name="gr27" draw:text-style-name="P4" draw:layer="layout" svg:width="15.398cm" svg:height="1.057cm" svg:x="2.91cm" svg:y="25.718cm">
          <text:p text:style-name="P3"><text:span text:style-name="T4">Support jury - Épreuve E5 | Angoran Moyé Judes-Uriel Stéphan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-right" draw:style-name="gr28" draw:text-style-name="P10" draw:layer="layout" svg:width="1.745cm" svg:height="1.057cm" svg:x="46.143cm" svg:y="25.718cm">
          <text:p text:style-name="P9"><text:span text:style-name="T4">03 / 1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0cm" svg:height="0cm" svg:x="0cm" svg:y="0cm" draw:page-number="3" presentation:class="page"/>
          <draw:frame draw:name="Notes Placeholder 2" presentation:style-name="pr5" draw:text-style-name="P11" draw:layer="layout" svg:width="0cm" svg:height="0cm" svg:x="0cm" svg:y="0cm" presentation:class="notes" presentation:placeholder="true">
            <draw:text-box/>
          </draw:frame>
          <draw:frame draw:name="Slide Number Placeholder 3" presentation:style-name="pr6" draw:text-style-name="P12" draw:layer="layout" svg:width="0cm" svg:height="0cm" svg:x="0cm" svg:y="0cm" presentation:class="page-number">
            <draw:text-box>
              <text:p/>
            </draw:text-box>
          </draw:frame>
        </presentation:notes>
      </draw:page>
      <draw:page draw:name="page4" draw:style-name="dp1" draw:master-page-name="Title_20_Slide" presentation:presentation-page-layout-name="AL1T0">
        <draw:custom-shape draw:name="print-accent-side" draw:style-name="gr29" draw:text-style-name="P20" draw:layer="layout" svg:width="0.899cm" svg:height="28.574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int-top-rule" draw:style-name="gr1" draw:text-style-name="P1" draw:layer="layout" svg:width="50.799cm" svg:height="0.31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yebrow" draw:style-name="gr30" draw:text-style-name="P4" draw:layer="layout" svg:width="44.978cm" svg:height="0.581cm" svg:x="2.91cm" svg:y="1.799cm">
          <text:p text:style-name="P3"><text:span text:style-name="T12">Présentation E5 - BTS SIO SLA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-title" draw:style-name="gr31" draw:text-style-name="P14" draw:layer="layout" svg:width="44.978cm" svg:height="1.798cm" svg:x="2.91cm" svg:y="2.805cm">
          <text:p text:style-name="P13"><text:span text:style-name="T6">Parcours scolair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-subtitle" draw:style-name="gr32" draw:text-style-name="P16" draw:layer="layout" svg:width="17.462cm" svg:height="0.899cm" svg:x="2.91cm" svg:y="4.974cm">
          <text:p text:style-name="P15"><text:span text:style-name="T7">De la logique scientifique aux bases du développement applicatif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chool-left" draw:style-name="gr33" draw:text-style-name="P21" draw:layer="layout" svg:width="22.039cm" svg:height="17.874cm" svg:x="2.91cm" svg:y="6.88cm">
          <text:p/>
          <draw:enhanced-geometry draw:mirror-horizontal="false" draw:mirror-vertical="false" draw:glue-points="?f8 0 0 ?f9 ?f8 ?f10 ?f11 ?f9" draw:text-areas="?f5 ?f5 ?f6 ?f7" svg:viewBox="0 0 0 0" draw:type="ooxml-roundRect" draw:modifiers="236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chool-left-accent" draw:style-name="gr29" draw:text-style-name="P20" draw:layer="layout" svg:width="2.433cm" svg:height="0.131cm" svg:x="3.81cm" svg:y="7.67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ction-rule" draw:style-name="gr29" draw:text-style-name="P20" draw:layer="layout" svg:width="1.534cm" svg:height="0.131cm" svg:x="3.81cm" svg:y="8.5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ction-label" draw:style-name="gr34" draw:text-style-name="P4" draw:layer="layout" svg:width="18.361cm" svg:height="0.634cm" svg:x="5.715cm" svg:y="8.308cm">
          <text:p text:style-name="P3"><text:span text:style-name="T13">Étap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0" draw:style-name="gr29" draw:text-style-name="P20" draw:layer="layout" svg:width="0.369cm" svg:height="0.369cm" svg:x="3.81cm" svg:y="9.41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0" draw:style-name="gr35" draw:text-style-name="P18" draw:layer="layout" svg:width="19.419cm" svg:height="1.057cm" svg:x="4.657cm" svg:y="9.419cm">
          <text:p text:style-name="P17"><text:span text:style-name="T14">Baccalauréat scientifiqu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1" draw:style-name="gr29" draw:text-style-name="P20" draw:layer="layout" svg:width="0.369cm" svg:height="0.369cm" svg:x="3.81cm" svg:y="11.00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1" draw:style-name="gr36" draw:text-style-name="P18" draw:layer="layout" svg:width="19.419cm" svg:height="1.057cm" svg:x="4.657cm" svg:y="11.007cm">
          <text:p text:style-name="P17"><text:span text:style-name="T14">Découverte autonome de Pyth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2" draw:style-name="gr29" draw:text-style-name="P20" draw:layer="layout" svg:width="0.369cm" svg:height="0.369cm" svg:x="3.81cm" svg:y="12.594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2" draw:style-name="gr37" draw:text-style-name="P18" draw:layer="layout" svg:width="19.419cm" svg:height="1.057cm" svg:x="4.657cm" svg:y="12.594cm">
          <text:p text:style-name="P17"><text:span text:style-name="T14">BTS SIO option SLAM à l’Institut F2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chool-right" draw:style-name="gr33" draw:text-style-name="P21" draw:layer="layout" svg:width="22.039cm" svg:height="17.874cm" svg:x="25.85cm" svg:y="6.98cm">
          <text:p/>
          <draw:enhanced-geometry draw:mirror-horizontal="false" draw:mirror-vertical="false" draw:glue-points="?f8 0 0 ?f9 ?f8 ?f10 ?f11 ?f9" draw:text-areas="?f5 ?f5 ?f6 ?f7" svg:viewBox="0 0 0 0" draw:type="ooxml-roundRect" draw:modifiers="236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chool-right-accent" draw:style-name="gr29" draw:text-style-name="P20" draw:layer="layout" svg:width="2.433cm" svg:height="0.131cm" svg:x="26.776cm" svg:y="7.67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ction-rule" draw:style-name="gr29" draw:text-style-name="P20" draw:layer="layout" svg:width="1.534cm" svg:height="0.131cm" svg:x="26.776cm" svg:y="8.5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ction-label" draw:style-name="gr38" draw:text-style-name="P4" draw:layer="layout" svg:width="18.361cm" svg:height="0.634cm" svg:x="28.681cm" svg:y="8.308cm">
          <text:p text:style-name="P3"><text:span text:style-name="T13">Méthode travaillé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0" draw:style-name="gr29" draw:text-style-name="P20" draw:layer="layout" svg:width="0.369cm" svg:height="0.369cm" svg:x="26.776cm" svg:y="9.41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0" draw:style-name="gr39" draw:text-style-name="P18" draw:layer="layout" svg:width="19.419cm" svg:height="1.057cm" svg:x="27.623cm" svg:y="9.419cm">
          <text:p text:style-name="P17"><text:span text:style-name="T14">Identifier le beso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1" draw:style-name="gr29" draw:text-style-name="P20" draw:layer="layout" svg:width="0.369cm" svg:height="0.369cm" svg:x="26.776cm" svg:y="11.00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1" draw:style-name="gr40" draw:text-style-name="P18" draw:layer="layout" svg:width="19.419cm" svg:height="1.057cm" svg:x="27.623cm" svg:y="11.007cm">
          <text:p text:style-name="P17"><text:span text:style-name="T14">Choisir une solu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2" draw:style-name="gr29" draw:text-style-name="P20" draw:layer="layout" svg:width="0.369cm" svg:height="0.369cm" svg:x="26.776cm" svg:y="12.594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2" draw:style-name="gr41" draw:text-style-name="P18" draw:layer="layout" svg:width="19.419cm" svg:height="1.057cm" svg:x="27.623cm" svg:y="12.594cm">
          <text:p text:style-name="P17"><text:span text:style-name="T14">Développer, tester et document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3" draw:style-name="gr29" draw:text-style-name="P20" draw:layer="layout" svg:width="0.369cm" svg:height="0.369cm" svg:x="26.776cm" svg:y="14.23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3" draw:style-name="gr42" draw:text-style-name="P18" draw:layer="layout" svg:width="19.419cm" svg:height="1.057cm" svg:x="27.623cm" svg:y="14.235cm">
          <text:p text:style-name="P17"><text:span text:style-name="T14">Présenter un résultat exploitabl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-left" draw:style-name="gr43" draw:text-style-name="P4" draw:layer="layout" svg:width="15.398cm" svg:height="1.057cm" svg:x="2.91cm" svg:y="25.718cm">
          <text:p text:style-name="P3"><text:span text:style-name="T4">Support jury - Épreuve E5 | Angoran Moyé Judes-Uriel Stéphan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-right" draw:style-name="gr44" draw:text-style-name="P10" draw:layer="layout" svg:width="1.745cm" svg:height="1.057cm" svg:x="46.143cm" svg:y="25.718cm">
          <text:p text:style-name="P9"><text:span text:style-name="T4">04 / 1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0cm" svg:height="0cm" svg:x="0cm" svg:y="0cm" draw:page-number="4" presentation:class="page"/>
          <draw:frame draw:name="Notes Placeholder 2" presentation:style-name="pr7" draw:text-style-name="P11" draw:layer="layout" svg:width="0cm" svg:height="0cm" svg:x="0cm" svg:y="0cm" presentation:class="notes" presentation:placeholder="true">
            <draw:text-box/>
          </draw:frame>
          <draw:frame draw:name="Slide Number Placeholder 3" presentation:style-name="pr8" draw:text-style-name="P12" draw:layer="layout" svg:width="0cm" svg:height="0cm" svg:x="0cm" svg:y="0cm" presentation:class="page-number">
            <draw:text-box>
              <text:p/>
            </draw:text-box>
          </draw:frame>
        </presentation:notes>
      </draw:page>
      <draw:page draw:name="page5" draw:style-name="dp1" draw:master-page-name="Title_20_Slide" presentation:presentation-page-layout-name="AL1T0">
        <draw:custom-shape draw:name="print-accent-side" draw:style-name="gr2" draw:text-style-name="P2" draw:layer="layout" svg:width="0.899cm" svg:height="28.574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int-top-rule" draw:style-name="gr1" draw:text-style-name="P1" draw:layer="layout" svg:width="50.799cm" svg:height="0.31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yebrow" draw:style-name="gr45" draw:text-style-name="P4" draw:layer="layout" svg:width="44.978cm" svg:height="0.581cm" svg:x="2.91cm" svg:y="1.799cm">
          <text:p text:style-name="P3"><text:span text:style-name="T5">Présentation E5 - BTS SIO SLA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-title" draw:style-name="gr46" draw:text-style-name="P14" draw:layer="layout" svg:width="44.978cm" svg:height="1.798cm" svg:x="2.91cm" svg:y="2.805cm">
          <text:p text:style-name="P13"><text:span text:style-name="T6">Stages et expérienc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-subtitle" draw:style-name="gr47" draw:text-style-name="P16" draw:layer="layout" svg:width="19.419cm" svg:height="1.798cm" svg:x="2.91cm" svg:y="4.974cm">
          <text:p text:style-name="P15"><text:span text:style-name="T7">L’apport principal : passer d’un cadre scolaire à un contexte plus concre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0" draw:style-name="gr2" draw:text-style-name="P2" draw:layer="layout" svg:width="0.369cm" svg:height="0.369cm" svg:x="2.91cm" svg:y="7.77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0" draw:style-name="gr48" draw:text-style-name="P18" draw:layer="layout" svg:width="44.132cm" svg:height="1.216cm" svg:x="3.757cm" svg:y="7.779cm">
          <text:p text:style-name="P17"><text:span text:style-name="T15">A’Numérique : développement web avec React.js et Next.j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1" draw:style-name="gr2" draw:text-style-name="P2" draw:layer="layout" svg:width="0.369cm" svg:height="0.369cm" svg:x="2.91cm" svg:y="9.52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1" draw:style-name="gr49" draw:text-style-name="P18" draw:layer="layout" svg:width="44.132cm" svg:height="1.216cm" svg:x="3.757cm" svg:y="9.525cm">
          <text:p text:style-name="P17"><text:span text:style-name="T15">Travail sur les fonctionnalités front-end et la lisibilité du cod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2" draw:style-name="gr2" draw:text-style-name="P2" draw:layer="layout" svg:width="0.369cm" svg:height="0.369cm" svg:x="2.91cm" svg:y="11.27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2" draw:style-name="gr50" draw:text-style-name="P18" draw:layer="layout" svg:width="44.132cm" svg:height="1.216cm" svg:x="3.757cm" svg:y="11.271cm">
          <text:p text:style-name="P17"><text:span text:style-name="T15">Projet d’agrégation : scraping → stockage → seeding → affichag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3" draw:style-name="gr2" draw:text-style-name="P2" draw:layer="layout" svg:width="0.369cm" svg:height="0.369cm" svg:x="2.91cm" svg:y="13.01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3" draw:style-name="gr51" draw:text-style-name="P18" draw:layer="layout" svg:width="44.132cm" svg:height="1.216cm" svg:x="3.757cm" svg:y="13.018cm">
          <text:p text:style-name="P17"><text:span text:style-name="T15">Compétence clé : fiabiliser les données entre les environnemen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-left" draw:style-name="gr52" draw:text-style-name="P4" draw:layer="layout" svg:width="15.398cm" svg:height="1.057cm" svg:x="2.91cm" svg:y="25.718cm">
          <text:p text:style-name="P3"><text:span text:style-name="T4">Support jury - Épreuve E5 | Angoran Moyé Judes-Uriel Stéphan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-right" draw:style-name="gr53" draw:text-style-name="P10" draw:layer="layout" svg:width="1.745cm" svg:height="1.057cm" svg:x="46.143cm" svg:y="25.718cm">
          <text:p text:style-name="P9"><text:span text:style-name="T4">05 / 1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0cm" svg:height="0cm" svg:x="0cm" svg:y="0cm" draw:page-number="5" presentation:class="page"/>
          <draw:frame draw:name="Notes Placeholder 2" presentation:style-name="pr9" draw:text-style-name="P11" draw:layer="layout" svg:width="0cm" svg:height="0cm" svg:x="0cm" svg:y="0cm" presentation:class="notes" presentation:placeholder="true">
            <draw:text-box/>
          </draw:frame>
          <draw:frame draw:name="Slide Number Placeholder 3" presentation:style-name="pr10" draw:text-style-name="P12" draw:layer="layout" svg:width="0cm" svg:height="0cm" svg:x="0cm" svg:y="0cm" presentation:class="page-number">
            <draw:text-box>
              <text:p/>
            </draw:text-box>
          </draw:frame>
        </presentation:notes>
      </draw:page>
      <draw:page draw:name="page6" draw:style-name="dp1" draw:master-page-name="Title_20_Slide" presentation:presentation-page-layout-name="AL1T0">
        <draw:custom-shape draw:name="print-accent-side" draw:style-name="gr19" draw:text-style-name="P19" draw:layer="layout" svg:width="0.899cm" svg:height="28.574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int-top-rule" draw:style-name="gr1" draw:text-style-name="P1" draw:layer="layout" svg:width="50.799cm" svg:height="0.31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yebrow" draw:style-name="gr54" draw:text-style-name="P4" draw:layer="layout" svg:width="44.978cm" svg:height="0.581cm" svg:x="2.91cm" svg:y="1.799cm">
          <text:p text:style-name="P3"><text:span text:style-name="T10">Présentation E5 - BTS SIO SLA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-title" draw:style-name="gr55" draw:text-style-name="P14" draw:layer="layout" svg:width="44.978cm" svg:height="1.798cm" svg:x="2.91cm" svg:y="2.805cm">
          <text:p text:style-name="P13"><text:span text:style-name="T6">Projets principaux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-subtitle" draw:style-name="gr56" draw:text-style-name="P16" draw:layer="layout" svg:width="23.917cm" svg:height="1.798cm" svg:x="2.91cm" svg:y="4.974cm">
          <text:p text:style-name="P15"><text:span text:style-name="T7">Des projets choisis comme preuves de compétences, avec un niveau de maturité assumé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aining-projects" draw:style-name="gr33" draw:text-style-name="P21" draw:layer="layout" svg:width="22.039cm" svg:height="16.985cm" svg:x="2.91cm" svg:y="7.769cm">
          <text:p/>
          <draw:enhanced-geometry draw:mirror-horizontal="false" draw:mirror-vertical="false" draw:glue-points="?f8 0 0 ?f9 ?f8 ?f10 ?f11 ?f9" draw:text-areas="?f5 ?f5 ?f6 ?f7" svg:viewBox="0 0 0 0" draw:type="ooxml-roundRect" draw:modifiers="249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raining-projects-accent" draw:style-name="gr19" draw:text-style-name="P19" draw:layer="layout" svg:width="2.433cm" svg:height="0.131cm" svg:x="3.81cm" svg:y="8.57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ction-rule" draw:style-name="gr19" draw:text-style-name="P19" draw:layer="layout" svg:width="1.534cm" svg:height="0.131cm" svg:x="3.81cm" svg:y="9.41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ction-label" draw:style-name="gr57" draw:text-style-name="P4" draw:layer="layout" svg:width="18.361cm" svg:height="0.634cm" svg:x="5.715cm" svg:y="9.155cm">
          <text:p text:style-name="P3"><text:span text:style-name="T13">Formation / B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0" draw:style-name="gr19" draw:text-style-name="P19" draw:layer="layout" svg:width="0.369cm" svg:height="0.369cm" svg:x="3.81cm" svg:y="10.26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0" draw:style-name="gr58" draw:text-style-name="P18" draw:layer="layout" svg:width="19.419cm" svg:height="1.004cm" svg:x="4.657cm" svg:y="10.266cm">
          <text:p text:style-name="P17"><text:span text:style-name="T16">GameConnect : réseau social PHP / MySQ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1" draw:style-name="gr19" draw:text-style-name="P19" draw:layer="layout" svg:width="0.369cm" svg:height="0.369cm" svg:x="3.81cm" svg:y="11.85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1" draw:style-name="gr59" draw:text-style-name="P18" draw:layer="layout" svg:width="19.419cm" svg:height="1.004cm" svg:x="4.657cm" svg:y="11.853cm">
          <text:p text:style-name="P17"><text:span text:style-name="T16">Hash Python : intégrité de fichiers SHA-25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2" draw:style-name="gr19" draw:text-style-name="P19" draw:layer="layout" svg:width="0.369cm" svg:height="0.369cm" svg:x="3.81cm" svg:y="13.44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2" draw:style-name="gr60" draw:text-style-name="P18" draw:layer="layout" svg:width="19.419cm" svg:height="1.004cm" svg:x="4.657cm" svg:y="13.441cm">
          <text:p text:style-name="P17"><text:span text:style-name="T16">Portfolio : CV, projets, veille et tableau de synthès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ersonal-projects" draw:style-name="gr33" draw:text-style-name="P21" draw:layer="layout" svg:width="22.039cm" svg:height="16.985cm" svg:x="25.85cm" svg:y="7.769cm">
          <text:p/>
          <draw:enhanced-geometry draw:mirror-horizontal="false" draw:mirror-vertical="false" draw:glue-points="?f8 0 0 ?f9 ?f8 ?f10 ?f11 ?f9" draw:text-areas="?f5 ?f5 ?f6 ?f7" svg:viewBox="0 0 0 0" draw:type="ooxml-roundRect" draw:modifiers="249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personal-projects-accent" draw:style-name="gr19" draw:text-style-name="P19" draw:layer="layout" svg:width="2.433cm" svg:height="0.131cm" svg:x="26.776cm" svg:y="8.57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ction-rule" draw:style-name="gr19" draw:text-style-name="P19" draw:layer="layout" svg:width="1.534cm" svg:height="0.131cm" svg:x="26.776cm" svg:y="9.41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ction-label" draw:style-name="gr61" draw:text-style-name="P4" draw:layer="layout" svg:width="18.361cm" svg:height="0.634cm" svg:x="28.681cm" svg:y="9.155cm">
          <text:p text:style-name="P3"><text:span text:style-name="T13">Orientation personnell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0" draw:style-name="gr19" draw:text-style-name="P19" draw:layer="layout" svg:width="0.369cm" svg:height="0.369cm" svg:x="26.776cm" svg:y="10.26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0" draw:style-name="gr62" draw:text-style-name="P18" draw:layer="layout" svg:width="19.419cm" svg:height="1.004cm" svg:x="27.623cm" svg:y="10.266cm">
          <text:p text:style-name="P17"><text:span text:style-name="T16">AIAuditOps : gouvernance et audit de systèmes I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1" draw:style-name="gr19" draw:text-style-name="P19" draw:layer="layout" svg:width="0.369cm" svg:height="0.369cm" svg:x="26.776cm" svg:y="11.85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1" draw:style-name="gr63" draw:text-style-name="P18" draw:layer="layout" svg:width="19.419cm" svg:height="1.004cm" svg:x="27.623cm" svg:y="11.853cm">
          <text:p text:style-name="P17"><text:span text:style-name="T16">MailGuardAI : analyse d’emails et niveau de risqu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2" draw:style-name="gr19" draw:text-style-name="P19" draw:layer="layout" svg:width="0.369cm" svg:height="0.369cm" svg:x="26.776cm" svg:y="13.44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2" draw:style-name="gr64" draw:text-style-name="P18" draw:layer="layout" svg:width="19.419cm" svg:height="1.004cm" svg:x="27.623cm" svg:y="13.441cm">
          <text:p text:style-name="P17"><text:span text:style-name="T16">Projets IA / données présentés sans les survendr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-left" draw:style-name="gr65" draw:text-style-name="P4" draw:layer="layout" svg:width="15.398cm" svg:height="1.057cm" svg:x="2.91cm" svg:y="25.718cm">
          <text:p text:style-name="P3"><text:span text:style-name="T4">Support jury - Épreuve E5 | Angoran Moyé Judes-Uriel Stéphan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-right" draw:style-name="gr66" draw:text-style-name="P10" draw:layer="layout" svg:width="1.745cm" svg:height="1.057cm" svg:x="46.143cm" svg:y="25.718cm">
          <text:p text:style-name="P9"><text:span text:style-name="T4">06 / 1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0cm" svg:height="0cm" svg:x="0cm" svg:y="0cm" draw:page-number="6" presentation:class="page"/>
          <draw:frame draw:name="Notes Placeholder 2" presentation:style-name="pr11" draw:text-style-name="P11" draw:layer="layout" svg:width="0cm" svg:height="0cm" svg:x="0cm" svg:y="0cm" presentation:class="notes" presentation:placeholder="true">
            <draw:text-box/>
          </draw:frame>
          <draw:frame draw:name="Slide Number Placeholder 3" presentation:style-name="pr12" draw:text-style-name="P12" draw:layer="layout" svg:width="0cm" svg:height="0cm" svg:x="0cm" svg:y="0cm" presentation:class="page-number">
            <draw:text-box>
              <text:p/>
            </draw:text-box>
          </draw:frame>
        </presentation:notes>
      </draw:page>
      <draw:page draw:name="page7" draw:style-name="dp1" draw:master-page-name="Title_20_Slide" presentation:presentation-page-layout-name="AL1T0">
        <draw:custom-shape draw:name="print-accent-side" draw:style-name="gr29" draw:text-style-name="P20" draw:layer="layout" svg:width="0.899cm" svg:height="28.574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int-top-rule" draw:style-name="gr1" draw:text-style-name="P1" draw:layer="layout" svg:width="50.799cm" svg:height="0.31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yebrow" draw:style-name="gr67" draw:text-style-name="P4" draw:layer="layout" svg:width="44.978cm" svg:height="0.581cm" svg:x="2.91cm" svg:y="1.799cm">
          <text:p text:style-name="P3"><text:span text:style-name="T12">Présentation E5 - BTS SIO SLA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-title" draw:style-name="gr68" draw:text-style-name="P14" draw:layer="layout" svg:width="44.978cm" svg:height="1.798cm" svg:x="2.91cm" svg:y="2.805cm">
          <text:p text:style-name="P13"><text:span text:style-name="T6">Certifications et apprentissag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-subtitle" draw:style-name="gr69" draw:text-style-name="P16" draw:layer="layout" svg:width="22.542cm" svg:height="1.798cm" svg:x="2.91cm" svg:y="4.974cm">
          <text:p text:style-name="P15"><text:span text:style-name="T7">Un complément au portfolio, orienté cybersécurité, développement et IA appliqué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ert-done" draw:style-name="gr33" draw:text-style-name="P21" draw:layer="layout" svg:width="19.835cm" svg:height="16.985cm" svg:x="2.91cm" svg:y="7.769cm">
          <text:p/>
          <draw:enhanced-geometry draw:mirror-horizontal="false" draw:mirror-vertical="false" draw:glue-points="?f8 0 0 ?f9 ?f8 ?f10 ?f11 ?f9" draw:text-areas="?f5 ?f5 ?f6 ?f7" svg:viewBox="0 0 0 0" draw:type="ooxml-roundRect" draw:modifiers="249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cert-done-accent" draw:style-name="gr29" draw:text-style-name="P20" draw:layer="layout" svg:width="2.433cm" svg:height="0.131cm" svg:x="3.81cm" svg:y="8.57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ction-rule" draw:style-name="gr29" draw:text-style-name="P20" draw:layer="layout" svg:width="1.534cm" svg:height="0.131cm" svg:x="3.81cm" svg:y="9.41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ction-label" draw:style-name="gr70" draw:text-style-name="P4" draw:layer="layout" svg:width="16.139cm" svg:height="0.634cm" svg:x="5.715cm" svg:y="9.155cm">
          <text:p text:style-name="P3"><text:span text:style-name="T13">Valid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0" draw:style-name="gr29" draw:text-style-name="P20" draw:layer="layout" svg:width="0.369cm" svg:height="0.369cm" svg:x="3.81cm" svg:y="10.26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0" draw:style-name="gr71" draw:text-style-name="P18" draw:layer="layout" svg:width="17.197cm" svg:height="1.11cm" svg:x="4.657cm" svg:y="10.266cm">
          <text:p text:style-name="P17"><text:span text:style-name="T17">SecNumacadémie - ANSS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1" draw:style-name="gr29" draw:text-style-name="P20" draw:layer="layout" svg:width="0.369cm" svg:height="0.369cm" svg:x="3.81cm" svg:y="11.90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1" draw:style-name="gr72" draw:text-style-name="P18" draw:layer="layout" svg:width="17.197cm" svg:height="1.11cm" svg:x="4.657cm" svg:y="11.906cm">
          <text:p text:style-name="P17"><text:span text:style-name="T17">OpenClassrooms : bases du langage Pyth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ert-next" draw:style-name="gr33" draw:text-style-name="P21" draw:layer="layout" svg:width="24.243cm" svg:height="16.985cm" svg:x="23.646cm" svg:y="7.769cm">
          <text:p/>
          <draw:enhanced-geometry draw:mirror-horizontal="false" draw:mirror-vertical="false" draw:glue-points="?f8 0 0 ?f9 ?f8 ?f10 ?f11 ?f9" draw:text-areas="?f5 ?f5 ?f6 ?f7" svg:viewBox="0 0 0 0" draw:type="ooxml-roundRect" draw:modifiers="249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cert-next-accent" draw:style-name="gr29" draw:text-style-name="P20" draw:layer="layout" svg:width="2.433cm" svg:height="0.131cm" svg:x="24.553cm" svg:y="8.57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ction-rule" draw:style-name="gr29" draw:text-style-name="P20" draw:layer="layout" svg:width="1.534cm" svg:height="0.131cm" svg:x="24.553cm" svg:y="9.41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ction-label" draw:style-name="gr73" draw:text-style-name="P4" draw:layer="layout" svg:width="20.531cm" svg:height="0.634cm" svg:x="26.458cm" svg:y="9.155cm">
          <text:p text:style-name="P3"><text:span text:style-name="T13">Prévu / vis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0" draw:style-name="gr29" draw:text-style-name="P20" draw:layer="layout" svg:width="0.369cm" svg:height="0.369cm" svg:x="24.553cm" svg:y="10.26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0" draw:style-name="gr74" draw:text-style-name="P18" draw:layer="layout" svg:width="21.589cm" svg:height="1.11cm" svg:x="25.4cm" svg:y="10.266cm">
          <text:p text:style-name="P17"><text:span text:style-name="T17">React.js et Next.j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1" draw:style-name="gr29" draw:text-style-name="P20" draw:layer="layout" svg:width="0.369cm" svg:height="0.369cm" svg:x="24.553cm" svg:y="11.90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1" draw:style-name="gr75" draw:text-style-name="P18" draw:layer="layout" svg:width="21.589cm" svg:height="1.11cm" svg:x="25.4cm" svg:y="11.906cm">
          <text:p text:style-name="P17"><text:span text:style-name="T17">Fondamentaux cybersécurit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2" draw:style-name="gr29" draw:text-style-name="P20" draw:layer="layout" svg:width="0.369cm" svg:height="0.369cm" svg:x="24.553cm" svg:y="13.54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2" draw:style-name="gr76" draw:text-style-name="P18" draw:layer="layout" svg:width="21.589cm" svg:height="1.11cm" svg:x="25.4cm" svg:y="13.547cm">
          <text:p text:style-name="P17"><text:span text:style-name="T17">Docker, cloud et déploieme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3" draw:style-name="gr29" draw:text-style-name="P20" draw:layer="layout" svg:width="0.369cm" svg:height="0.369cm" svg:x="24.553cm" svg:y="15.24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3" draw:style-name="gr77" draw:text-style-name="P18" draw:layer="layout" svg:width="21.589cm" svg:height="1.11cm" svg:x="25.4cm" svg:y="15.24cm">
          <text:p text:style-name="P17"><text:span text:style-name="T17">Intelligence artificielle appliqué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-left" draw:style-name="gr78" draw:text-style-name="P4" draw:layer="layout" svg:width="15.398cm" svg:height="1.057cm" svg:x="2.91cm" svg:y="25.718cm">
          <text:p text:style-name="P3"><text:span text:style-name="T4">Support jury - Épreuve E5 | Angoran Moyé Judes-Uriel Stéphan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-right" draw:style-name="gr79" draw:text-style-name="P10" draw:layer="layout" svg:width="1.745cm" svg:height="1.057cm" svg:x="46.143cm" svg:y="25.718cm">
          <text:p text:style-name="P9"><text:span text:style-name="T4">07 / 1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0cm" svg:height="0cm" svg:x="0cm" svg:y="0cm" draw:page-number="7" presentation:class="page"/>
          <draw:frame draw:name="Notes Placeholder 2" presentation:style-name="pr13" draw:text-style-name="P11" draw:layer="layout" svg:width="0cm" svg:height="0cm" svg:x="0cm" svg:y="0cm" presentation:class="notes" presentation:placeholder="true">
            <draw:text-box/>
          </draw:frame>
          <draw:frame draw:name="Slide Number Placeholder 3" presentation:style-name="pr14" draw:text-style-name="P12" draw:layer="layout" svg:width="0cm" svg:height="0cm" svg:x="0cm" svg:y="0cm" presentation:class="page-number">
            <draw:text-box>
              <text:p/>
            </draw:text-box>
          </draw:frame>
        </presentation:notes>
      </draw:page>
      <draw:page draw:name="page8" draw:style-name="dp1" draw:master-page-name="Title_20_Slide" presentation:presentation-page-layout-name="AL1T0">
        <draw:custom-shape draw:name="print-accent-side" draw:style-name="gr2" draw:text-style-name="P2" draw:layer="layout" svg:width="0.899cm" svg:height="28.574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int-top-rule" draw:style-name="gr1" draw:text-style-name="P1" draw:layer="layout" svg:width="50.799cm" svg:height="0.31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yebrow" draw:style-name="gr80" draw:text-style-name="P4" draw:layer="layout" svg:width="44.978cm" svg:height="0.581cm" svg:x="2.91cm" svg:y="1.799cm">
          <text:p text:style-name="P3"><text:span text:style-name="T5">Présentation E5 - BTS SIO SLA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-title" draw:style-name="gr81" draw:text-style-name="P14" draw:layer="layout" svg:width="44.978cm" svg:height="1.798cm" svg:x="2.91cm" svg:y="2.805cm">
          <text:p text:style-name="P13"><text:span text:style-name="T6">Veille technologiqu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-subtitle" draw:style-name="gr82" draw:text-style-name="P16" draw:layer="layout" svg:width="17.514cm" svg:height="1.798cm" svg:x="2.91cm" svg:y="4.974cm">
          <text:p text:style-name="P15"><text:span text:style-name="T7">Thème : l’IA orientée vers la défense des systèmes informatique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0" draw:style-name="gr2" draw:text-style-name="P2" draw:layer="layout" svg:width="0.369cm" svg:height="0.369cm" svg:x="2.91cm" svg:y="7.77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0" draw:style-name="gr83" draw:text-style-name="P18" draw:layer="layout" svg:width="44.132cm" svg:height="1.216cm" svg:x="3.757cm" svg:y="7.779cm">
          <text:p text:style-name="P17"><text:span text:style-name="T11">Détection d’anomalies et priorisation des alert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1" draw:style-name="gr2" draw:text-style-name="P2" draw:layer="layout" svg:width="0.369cm" svg:height="0.369cm" svg:x="2.91cm" svg:y="9.52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1" draw:style-name="gr84" draw:text-style-name="P18" draw:layer="layout" svg:width="44.132cm" svg:height="1.216cm" svg:x="3.757cm" svg:y="9.525cm">
          <text:p text:style-name="P17"><text:span text:style-name="T11">Synthèse d’incidents et aide à l’investig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2" draw:style-name="gr2" draw:text-style-name="P2" draw:layer="layout" svg:width="0.369cm" svg:height="0.369cm" svg:x="2.91cm" svg:y="11.324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2" draw:style-name="gr85" draw:text-style-name="P18" draw:layer="layout" svg:width="44.132cm" svg:height="1.216cm" svg:x="3.757cm" svg:y="11.324cm">
          <text:p text:style-name="P17"><text:span text:style-name="T11">Automatisation utile, mais avec contrôle huma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3" draw:style-name="gr2" draw:text-style-name="P2" draw:layer="layout" svg:width="0.369cm" svg:height="0.369cm" svg:x="2.91cm" svg:y="13.12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3" draw:style-name="gr86" draw:text-style-name="P18" draw:layer="layout" svg:width="44.132cm" svg:height="1.216cm" svg:x="3.757cm" svg:y="13.123cm">
          <text:p text:style-name="P17"><text:span text:style-name="T11">Principe retenu : l’IA assiste, l’humain décid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-left" draw:style-name="gr87" draw:text-style-name="P4" draw:layer="layout" svg:width="15.398cm" svg:height="1.057cm" svg:x="2.91cm" svg:y="25.718cm">
          <text:p text:style-name="P3"><text:span text:style-name="T4">Support jury - Épreuve E5 | Angoran Moyé Judes-Uriel Stéphan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-right" draw:style-name="gr88" draw:text-style-name="P10" draw:layer="layout" svg:width="1.745cm" svg:height="1.057cm" svg:x="46.143cm" svg:y="25.718cm">
          <text:p text:style-name="P9"><text:span text:style-name="T4">08 / 1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0cm" svg:height="0cm" svg:x="0cm" svg:y="0cm" draw:page-number="8" presentation:class="page"/>
          <draw:frame draw:name="Notes Placeholder 2" presentation:style-name="pr15" draw:text-style-name="P11" draw:layer="layout" svg:width="0cm" svg:height="0cm" svg:x="0cm" svg:y="0cm" presentation:class="notes" presentation:placeholder="true">
            <draw:text-box/>
          </draw:frame>
          <draw:frame draw:name="Slide Number Placeholder 3" presentation:style-name="pr16" draw:text-style-name="P12" draw:layer="layout" svg:width="0cm" svg:height="0cm" svg:x="0cm" svg:y="0cm" presentation:class="page-number">
            <draw:text-box>
              <text:p/>
            </draw:text-box>
          </draw:frame>
        </presentation:notes>
      </draw:page>
      <draw:page draw:name="page9" draw:style-name="dp1" draw:master-page-name="Title_20_Slide" presentation:presentation-page-layout-name="AL1T0">
        <draw:custom-shape draw:name="print-accent-side" draw:style-name="gr19" draw:text-style-name="P19" draw:layer="layout" svg:width="0.899cm" svg:height="28.574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int-top-rule" draw:style-name="gr1" draw:text-style-name="P1" draw:layer="layout" svg:width="50.799cm" svg:height="0.31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yebrow" draw:style-name="gr89" draw:text-style-name="P4" draw:layer="layout" svg:width="44.978cm" svg:height="0.581cm" svg:x="2.91cm" svg:y="1.799cm">
          <text:p text:style-name="P3"><text:span text:style-name="T10">Présentation E5 - BTS SIO SLA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-title" draw:style-name="gr90" draw:text-style-name="P14" draw:layer="layout" svg:width="44.978cm" svg:height="1.798cm" svg:x="2.91cm" svg:y="2.805cm">
          <text:p text:style-name="P13"><text:span text:style-name="T6">Orientation après le B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-subtitle" draw:style-name="gr91" draw:text-style-name="P16" draw:layer="layout" svg:width="24.976cm" svg:height="0.899cm" svg:x="2.91cm" svg:y="4.974cm">
          <text:p text:style-name="P15"><text:span text:style-name="T7">Construire une suite logique entre études, professionnalisation et ambition entrepreneurial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0" draw:style-name="gr19" draw:text-style-name="P19" draw:layer="layout" svg:width="0.369cm" svg:height="0.369cm" svg:x="2.91cm" svg:y="6.87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0" draw:style-name="gr92" draw:text-style-name="P18" draw:layer="layout" svg:width="44.132cm" svg:height="1.216cm" svg:x="3.757cm" svg:y="6.879cm">
          <text:p text:style-name="P17"><text:span text:style-name="T11">Poursuite visée : Bac+3, Bachelor ou Licence professionnell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1" draw:style-name="gr19" draw:text-style-name="P19" draw:layer="layout" svg:width="0.369cm" svg:height="0.369cm" svg:x="2.91cm" svg:y="8.67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1" draw:style-name="gr93" draw:text-style-name="P18" draw:layer="layout" svg:width="44.132cm" svg:height="1.216cm" svg:x="3.757cm" svg:y="8.678cm">
          <text:p text:style-name="P17"><text:span text:style-name="T11">Axes : data / I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2" draw:style-name="gr19" draw:text-style-name="P19" draw:layer="layout" svg:width="0.369cm" svg:height="0.369cm" svg:x="2.91cm" svg:y="10.42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2" draw:style-name="gr94" draw:text-style-name="P18" draw:layer="layout" svg:width="44.132cm" svg:height="1.216cm" svg:x="3.757cm" svg:y="10.425cm">
          <text:p text:style-name="P17"><text:span text:style-name="T11">Objectif moyen terme : développeur full-stack orienté produi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3" draw:style-name="gr19" draw:text-style-name="P19" draw:layer="layout" svg:width="0.369cm" svg:height="0.369cm" svg:x="2.91cm" svg:y="12.224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3" draw:style-name="gr95" draw:text-style-name="P18" draw:layer="layout" svg:width="44.132cm" svg:height="1.216cm" svg:x="3.757cm" svg:y="12.224cm">
          <text:p text:style-name="P17"><text:span text:style-name="T11">Ambition long terme : monter une startu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-left" draw:style-name="gr96" draw:text-style-name="P4" draw:layer="layout" svg:width="15.398cm" svg:height="1.057cm" svg:x="2.91cm" svg:y="25.718cm">
          <text:p text:style-name="P3"><text:span text:style-name="T4">Support jury - Épreuve E5 | Angoran Moyé Judes-Uriel Stéphan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-right" draw:style-name="gr97" draw:text-style-name="P10" draw:layer="layout" svg:width="1.745cm" svg:height="1.057cm" svg:x="46.143cm" svg:y="25.718cm">
          <text:p text:style-name="P9"><text:span text:style-name="T4">09 / 1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0cm" svg:height="0cm" svg:x="0cm" svg:y="0cm" draw:page-number="9" presentation:class="page"/>
          <draw:frame draw:name="Notes Placeholder 2" presentation:style-name="pr17" draw:text-style-name="P11" draw:layer="layout" svg:width="0cm" svg:height="0cm" svg:x="0cm" svg:y="0cm" presentation:class="notes" presentation:placeholder="true">
            <draw:text-box/>
          </draw:frame>
          <draw:frame draw:name="Slide Number Placeholder 3" presentation:style-name="pr18" draw:text-style-name="P12" draw:layer="layout" svg:width="0cm" svg:height="0cm" svg:x="0cm" svg:y="0cm" presentation:class="page-number">
            <draw:text-box>
              <text:p/>
            </draw:text-box>
          </draw:frame>
        </presentation:notes>
      </draw:page>
      <draw:page draw:name="page10" draw:style-name="dp1" draw:master-page-name="Title_20_Slide" presentation:presentation-page-layout-name="AL1T0">
        <draw:custom-shape draw:name="print-accent-side" draw:style-name="gr2" draw:text-style-name="P2" draw:layer="layout" svg:width="0.899cm" svg:height="28.574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int-top-rule" draw:style-name="gr1" draw:text-style-name="P1" draw:layer="layout" svg:width="50.799cm" svg:height="0.31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yebrow" draw:style-name="gr98" draw:text-style-name="P4" draw:layer="layout" svg:width="44.978cm" svg:height="0.581cm" svg:x="2.91cm" svg:y="1.799cm">
          <text:p text:style-name="P3"><text:span text:style-name="T5">Présentation E5 - BTS SIO SLA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-title" draw:style-name="gr99" draw:text-style-name="P14" draw:layer="layout" svg:width="44.978cm" svg:height="1.798cm" svg:x="2.91cm" svg:y="2.805cm">
          <text:p text:style-name="P13"><text:span text:style-name="T6">Conclus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-subtitle" draw:style-name="gr100" draw:text-style-name="P16" draw:layer="layout" svg:width="13.863cm" svg:height="1.798cm" svg:x="2.91cm" svg:y="4.974cm">
          <text:p text:style-name="P15"><text:span text:style-name="T7">Ce que le portfolio doit faire ressortir devant le jur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0" draw:style-name="gr2" draw:text-style-name="P2" draw:layer="layout" svg:width="0.369cm" svg:height="0.369cm" svg:x="2.91cm" svg:y="11.95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0" draw:style-name="gr101" draw:text-style-name="P18" draw:layer="layout" svg:width="44.132cm" svg:height="1.269cm" svg:x="3.757cm" svg:y="11.959cm">
          <text:p text:style-name="P17"><text:span text:style-name="T8">Une progression construite par les proje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1" draw:style-name="gr2" draw:text-style-name="P2" draw:layer="layout" svg:width="0.369cm" svg:height="0.369cm" svg:x="2.91cm" svg:y="13.81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1" draw:style-name="gr102" draw:text-style-name="P18" draw:layer="layout" svg:width="44.132cm" svg:height="1.269cm" svg:x="3.757cm" svg:y="13.811cm">
          <text:p text:style-name="P17"><text:span text:style-name="T8">Des compétences techniques en consolid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2" draw:style-name="gr2" draw:text-style-name="P2" draw:layer="layout" svg:width="0.369cm" svg:height="0.369cm" svg:x="2.91cm" svg:y="15.6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2" draw:style-name="gr103" draw:text-style-name="P18" draw:layer="layout" svg:width="44.132cm" svg:height="1.269cm" svg:x="3.757cm" svg:y="15.61cm">
          <text:p text:style-name="P17"><text:span text:style-name="T8">Une orientation claire : données, IA et sécurit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ullet-dot-3" draw:style-name="gr2" draw:text-style-name="P2" draw:layer="layout" svg:width="0.369cm" svg:height="0.369cm" svg:x="2.91cm" svg:y="17.4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ullet-text-3" draw:style-name="gr104" draw:text-style-name="P18" draw:layer="layout" svg:width="44.132cm" svg:height="1.269cm" svg:x="3.757cm" svg:y="17.41cm">
          <text:p text:style-name="P17"><text:span text:style-name="T8">Une finalité : créer des solutions utiles et solid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hanks" draw:style-name="gr105" draw:text-style-name="P4" draw:layer="layout" svg:width="44.978cm" svg:height="1.11cm" svg:x="2.91cm" svg:y="19.473cm">
          <text:p text:style-name="P3"><text:span text:style-name="T18">Merci pour votre attentio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-left" draw:style-name="gr106" draw:text-style-name="P4" draw:layer="layout" svg:width="15.398cm" svg:height="1.057cm" svg:x="2.91cm" svg:y="25.718cm">
          <text:p text:style-name="P3"><text:span text:style-name="T4">Support jury - Épreuve E5 | Angoran Moyé Judes-Uriel Stéphan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-right" draw:style-name="gr107" draw:text-style-name="P10" draw:layer="layout" svg:width="1.745cm" svg:height="1.057cm" svg:x="46.143cm" svg:y="25.718cm">
          <text:p text:style-name="P9"><text:span text:style-name="T4">10 / 1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0cm" svg:height="0cm" svg:x="0cm" svg:y="0cm" draw:page-number="10" presentation:class="page"/>
          <draw:frame draw:name="Notes Placeholder 2" presentation:style-name="pr19" draw:text-style-name="P11" draw:layer="layout" svg:width="0cm" svg:height="0cm" svg:x="0cm" svg:y="0cm" presentation:class="notes" presentation:placeholder="true">
            <draw:text-box/>
          </draw:frame>
          <draw:frame draw:name="Slide Number Placeholder 3" presentation:style-name="pr20" draw:text-style-name="P12" draw:layer="layout" svg:width="0cm" svg:height="0cm" svg:x="0cm" svg:y="0cm" presentation:class="page-number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ptos" svg:font-family="Aptos"/>
    <style:font-face style:name="Arial" svg:font-family="Arial" style:font-family-generic="system" style:font-pitch="variable"/>
    <style:font-face style:name="Bahnschrift" svg:font-family="Bahnschrift"/>
    <style:font-face style:name="Calibri" svg:font-family="Calibri"/>
    <style:font-face style:name="Cascadia Code" svg:font-family="'Cascadia Cod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Calibri" style:font-family-asian="Calibri" style:font-size-asian="28pt" style:font-style-asian="normal" style:font-weight-asian="normal" style:font-name-complex="Calibri" style:font-family-complex="Calibri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Calibri" style:font-family-asian="Calibri" style:font-size-asian="20pt" style:font-style-asian="normal" style:font-weight-asian="normal" style:font-name-complex="Calibri" style:font-family-complex="Calibri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name-asian="Calibri" style:font-family-asian="Calibri" style:font-size-asian="18pt" style:font-style-asian="normal" style:font-weight-asian="normal" style:font-name-complex="Calibri" style:font-family-complex="Calibri" style:font-size-complex="18pt" style:font-style-complex="normal" style:font-weight-complex="normal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name-asian="Calibri" style:font-family-asian="Calibri" style:font-size-asian="18pt" style:font-style-asian="normal" style:font-weight-asian="normal" style:font-name-complex="Calibri" style:font-family-complex="Calibri" style:font-size-complex="18pt" style:font-style-complex="normal" style:font-weight-complex="normal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Calibri" style:font-family-asian="Calibri" style:font-size-asian="18pt" style:font-style-asian="normal" style:font-weight-asian="normal" style:font-name-complex="Calibri" style:font-family-complex="Calibri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Title_20_Slide" style:display-name="Title Slide" style:page-layout-name="PM1" draw:style-name="Mdp1">
      <loext:theme loext:name="ChatGPT">
        <loext:theme-colors loext:name="ChatGPT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presentation:style-name="Title_20_Slide-title" draw:layer="backgroundobjects" svg:width="45.719cm" svg:height="4.771cm" svg:x="2.54cm" svg:y="1.14cm" presentation:class="title" presentation:placeholder="true">
        <draw:text-box/>
      </draw:frame>
      <draw:frame presentation:style-name="Title_20_Slide-outline1" draw:layer="backgroundobjects" svg:width="45.719cm" svg:height="16.572cm" svg:x="2.54cm" svg:y="6.686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Walnut Exporter</meta:initial-creator>
    <dc:title>Presentation</dc:title>
    <meta:creation-date>2026-05-03T15:12:48.258000000</meta:creation-date>
    <dc:date>2026-05-03T17:27:04.084248900</dc:date>
    <meta:generator>LibreOffice/25.8.5.2$Windows_X86_64 LibreOffice_project/9c8b85f387cc00a89945a79c9e6239f32e450ac2</meta:generator>
    <meta:editing-duration>PT12M35S</meta:editing-duration>
    <meta:editing-cycles>1</meta:editing-cycles>
    <meta:document-statistic meta:object-count="231"/>
    <meta:user-defined meta:name="PresentationFormat">Converted Presentation</meta:user-defined>
  </office:meta>
</office:document-meta>
</file>
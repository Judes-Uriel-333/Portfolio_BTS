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3">
  <office:font-face-decls>
    <style:font-face style:name="Aptos" svg:font-family="Aptos"/>
    <style:font-face style:name="Bahnschrift" svg:font-family="Bahnschrift"/>
    <style:font-face style:name="Cascadia Code" svg:font-family="Cascadia Code"/>
  </office:font-face-decls>
  <office:body>
    <office:text>
      <text:p text:style-name="CoverEyebrow">Support de suivi pour le jury</text:p>
      <text:p text:style-name="CoverTitle">Présentation E5</text:p>
      <text:p text:style-name="CoverSubtitle">BTS SIO SLAM</text:p>
      <text:p text:style-name="CoverRule">━━━━━━</text:p>
      <text:p text:style-name="CoverMeta">Angoran Moyé Judes-Uriel Stéphanas</text:p>
      <text:p text:style-name="CoverMeta">Institut F2I - Session 2026</text:p>
      <text:p text:style-name="EyebrowCyanBreak">Présentation E5 - BTS SIO SLAM</text:p>
      <text:p text:style-name="SlideTitle">Fil conducteur</text:p>
      <text:p text:style-name="SlideSubtitle">Une lecture simple du parcours : bases, projets, professionnalisation, orientation.</text:p>
      <text:p text:style-name="Bullet"><text:span text:style-name="DotCyan">•</text:span><text:s/>Profil personnel et manière de progresser</text:p>
      <text:p text:style-name="Bullet"><text:span text:style-name="DotCyan">•</text:span><text:s/>Parcours scolaire et méthode de travail</text:p>
      <text:p text:style-name="Bullet"><text:span text:style-name="DotCyan">•</text:span><text:s/>Stages, projets et compétences mobilisées</text:p>
      <text:p text:style-name="Bullet"><text:span text:style-name="DotCyan">•</text:span><text:s/>Certifications, veille technologique et suite du parcours</text:p>
      <text:p text:style-name="SmallNote">Objectif : mettre en évidence une progression cohérente.</text:p>
      <text:p text:style-name="EyebrowGreenBreak">Présentation E5 - BTS SIO SLAM</text:p>
      <text:p text:style-name="SlideTitle">Profil personnel</text:p>
      <text:p text:style-name="SlideSubtitle">Un profil en construction sérieuse, centré sur la compréhension et la structure.</text:p>
      <text:p text:style-name="Bullet"><text:span text:style-name="DotGreen">•</text:span><text:s/>Comprendre les fondations avant d’aller vers des sujets plus complexes</text:p>
      <text:p text:style-name="Bullet"><text:span text:style-name="DotGreen">•</text:span><text:s/>Relier besoin, code, données et maintenabilité</text:p>
      <text:p text:style-name="Bullet"><text:span text:style-name="DotGreen">•</text:span><text:s/>Construire des solutions utiles, lisibles et évolutives</text:p>
      <text:p text:style-name="Bullet"><text:span text:style-name="DotGreen">•</text:span><text:s/>Présenter les projets avec transparence sur leur maturité</text:p>
      <text:p text:style-name="EyebrowAmberBreak">Présentation E5 - BTS SIO SLAM</text:p>
      <text:p text:style-name="SlideTitle">Parcours scolaire</text:p>
      <text:p text:style-name="SlideSubtitle">De la logique scientifique aux bases du développement applicatif.</text:p>
      <text:p text:style-name="BlockTitleAmber">Étapes</text:p>
      <text:p text:style-name="Bullet"><text:span text:style-name="DotAmber">•</text:span><text:s/>Baccalauréat scientifique</text:p>
      <text:p text:style-name="Bullet"><text:span text:style-name="DotAmber">•</text:span><text:s/>Découverte autonome de Python</text:p>
      <text:p text:style-name="Bullet"><text:span text:style-name="DotAmber">•</text:span><text:s/>BTS SIO option SLAM à l’Institut F2I</text:p>
      <text:p text:style-name="BlockTitleAmber">Méthode travaillée</text:p>
      <text:p text:style-name="Bullet"><text:span text:style-name="DotAmber">•</text:span><text:s/>Identifier le besoin</text:p>
      <text:p text:style-name="Bullet"><text:span text:style-name="DotAmber">•</text:span><text:s/>Choisir une solution</text:p>
      <text:p text:style-name="Bullet"><text:span text:style-name="DotAmber">•</text:span><text:s/>Développer, tester et documenter</text:p>
      <text:p text:style-name="Bullet"><text:span text:style-name="DotAmber">•</text:span><text:s/>Présenter un résultat exploitable</text:p>
      <text:p text:style-name="EyebrowCyanBreak">Présentation E5 - BTS SIO SLAM</text:p>
      <text:p text:style-name="SlideTitle">Stages et expériences</text:p>
      <text:p text:style-name="SlideSubtitle">L’apport principal : passer d’un cadre scolaire à un contexte plus concret.</text:p>
      <text:p text:style-name="Bullet"><text:span text:style-name="DotCyan">•</text:span><text:s/>A’Numérique : développement web avec React.js et Next.js</text:p>
      <text:p text:style-name="Bullet"><text:span text:style-name="DotCyan">•</text:span><text:s/>Travail sur les fonctionnalités front-end et la lisibilité du code</text:p>
      <text:p text:style-name="Bullet"><text:span text:style-name="DotCyan">•</text:span><text:s/>Projet d’agrégation : scraping → stockage → seeding → affichage</text:p>
      <text:p text:style-name="Bullet"><text:span text:style-name="DotCyan">•</text:span><text:s/>Compétence clé : fiabiliser les données entre les environnements</text:p>
      <text:p text:style-name="EyebrowGreenBreak">Présentation E5 - BTS SIO SLAM</text:p>
      <text:p text:style-name="SlideTitle">Projets principaux</text:p>
      <text:p text:style-name="SlideSubtitle">Des projets choisis comme preuves de compétences, avec un niveau de maturité assumé.</text:p>
      <text:p text:style-name="BlockTitleGreen">Formation / BTS</text:p>
      <text:p text:style-name="Bullet"><text:span text:style-name="DotGreen">•</text:span><text:s/>GameConnect : réseau social PHP / MySQL</text:p>
      <text:p text:style-name="Bullet"><text:span text:style-name="DotGreen">•</text:span><text:s/>Hash Python : intégrité de fichiers SHA-256</text:p>
      <text:p text:style-name="Bullet"><text:span text:style-name="DotGreen">•</text:span><text:s/>Portfolio : CV, projets, veille et tableau de synthèse</text:p>
      <text:p text:style-name="BlockTitleGreen">Orientation personnelle</text:p>
      <text:p text:style-name="Bullet"><text:span text:style-name="DotGreen">•</text:span><text:s/>AIAuditOps : gouvernance et audit de systèmes IA</text:p>
      <text:p text:style-name="Bullet"><text:span text:style-name="DotGreen">•</text:span><text:s/>MailGuardAI : analyse d’emails et niveau de risque</text:p>
      <text:p text:style-name="Bullet"><text:span text:style-name="DotGreen">•</text:span><text:s/>Projets IA / données présentés sans les survendre</text:p>
      <text:p text:style-name="EyebrowAmberBreak">Présentation E5 - BTS SIO SLAM</text:p>
      <text:p text:style-name="SlideTitle">Certifications et apprentissages</text:p>
      <text:p text:style-name="SlideSubtitle">Un complément au portfolio, orienté cybersécurité, développement et IA appliquée.</text:p>
      <text:p text:style-name="BlockTitleAmber">Validé</text:p>
      <text:p text:style-name="Bullet"><text:span text:style-name="DotAmber">•</text:span><text:s/>SecNumacadémie - ANSSI</text:p>
      <text:p text:style-name="Bullet"><text:span text:style-name="DotAmber">•</text:span><text:s/>OpenClassrooms : bases du langage Python</text:p>
      <text:p text:style-name="BlockTitleAmber">Prévu / visé</text:p>
      <text:p text:style-name="Bullet"><text:span text:style-name="DotAmber">•</text:span><text:s/>React.js et Next.js</text:p>
      <text:p text:style-name="Bullet"><text:span text:style-name="DotAmber">•</text:span><text:s/>Fondamentaux cybersécurité</text:p>
      <text:p text:style-name="Bullet"><text:span text:style-name="DotAmber">•</text:span><text:s/>Docker, cloud et déploiement</text:p>
      <text:p text:style-name="Bullet"><text:span text:style-name="DotAmber">•</text:span><text:s/>Intelligence artificielle appliquée</text:p>
      <text:p text:style-name="EyebrowCyanBreak">Présentation E5 - BTS SIO SLAM</text:p>
      <text:p text:style-name="SlideTitle">Veille technologique</text:p>
      <text:p text:style-name="SlideSubtitle">Thème : l’IA orientée vers la défense des systèmes informatiques.</text:p>
      <text:p text:style-name="Bullet"><text:span text:style-name="DotCyan">•</text:span><text:s/>Détection d’anomalies et priorisation des alertes</text:p>
      <text:p text:style-name="Bullet"><text:span text:style-name="DotCyan">•</text:span><text:s/>Synthèse d’incidents et aide à l’investigation</text:p>
      <text:p text:style-name="Bullet"><text:span text:style-name="DotCyan">•</text:span><text:s/>Automatisation utile, mais avec contrôle humain</text:p>
      <text:p text:style-name="Bullet"><text:span text:style-name="DotCyan">•</text:span><text:s/>Principe retenu : l’IA assiste, l’humain décide</text:p>
      <text:p text:style-name="EyebrowGreenBreak">Présentation E5 - BTS SIO SLAM</text:p>
      <text:p text:style-name="SlideTitle">Orientation après le BTS</text:p>
      <text:p text:style-name="SlideSubtitle">Construire une suite logique entre études, professionnalisation et ambition entrepreneuriale.</text:p>
      <text:p text:style-name="Bullet"><text:span text:style-name="DotGreen">•</text:span><text:s/>Poursuite visée : Bac+3, Bachelor ou Licence professionnelle</text:p>
      <text:p text:style-name="Bullet"><text:span text:style-name="DotGreen">•</text:span><text:s/>Axes : full-stack, data / IA, cybersécurité applicative</text:p>
      <text:p text:style-name="Bullet"><text:span text:style-name="DotGreen">•</text:span><text:s/>Objectif moyen terme : développeur full-stack orienté produit</text:p>
      <text:p text:style-name="Bullet"><text:span text:style-name="DotGreen">•</text:span><text:s/>Ambition long terme : monter une startup</text:p>
      <text:p text:style-name="EyebrowCyanBreak">Présentation E5 - BTS SIO SLAM</text:p>
      <text:p text:style-name="SlideTitle">Conclusion</text:p>
      <text:p text:style-name="SlideSubtitle">Ce que le portfolio doit faire ressortir devant le jury.</text:p>
      <text:p text:style-name="Bullet"><text:span text:style-name="DotCyan">•</text:span><text:s/>Une progression construite par les projets</text:p>
      <text:p text:style-name="Bullet"><text:span text:style-name="DotCyan">•</text:span><text:s/>Des compétences techniques en consolidation</text:p>
      <text:p text:style-name="Bullet"><text:span text:style-name="DotCyan">•</text:span><text:s/>Une orientation claire : données, IA et sécurité</text:p>
      <text:p text:style-name="Bullet"><text:span text:style-name="DotCyan">•</text:span><text:s/>Une finalité : créer des solutions utiles et solides</text:p>
      <text:p text:style-name="SmallNote">Merci pour votre atten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3">
  <office:font-face-decls>
    <style:font-face style:name="Aptos" svg:font-family="Aptos"/>
    <style:font-face style:name="Bahnschrift" svg:font-family="Bahnschrift"/>
    <style:font-face style:name="Cascadia Code" svg:font-family="Cascadia Code"/>
  </office:font-face-decls>
  <office:styles>
    <style:style style:name="CoverEyebrow" style:family="paragraph">
      <style:paragraph-properties fo:margin-top="7.2cm" fo:margin-bottom="0.25cm" fo:text-align="center"/>
      <style:text-properties style:font-name="Cascadia Code" fo:font-size="10pt" fo:font-weight="bold" fo:color="#0891B2"/>
    </style:style>
    <style:style style:name="CoverTitle" style:family="paragraph">
      <style:paragraph-properties fo:margin-top="0cm" fo:margin-bottom="0.08cm" fo:text-align="center"/>
      <style:text-properties style:font-name="Bahnschrift" fo:font-size="30pt" fo:font-weight="bold" fo:color="#0F172A"/>
    </style:style>
    <style:style style:name="CoverSubtitle" style:family="paragraph">
      <style:paragraph-properties fo:margin-top="0cm" fo:margin-bottom="0.25cm" fo:text-align="center"/>
      <style:text-properties style:font-name="Bahnschrift" fo:font-size="22pt" fo:font-weight="bold" fo:color="#0F172A"/>
    </style:style>
    <style:style style:name="CoverRule" style:family="paragraph">
      <style:paragraph-properties fo:margin-top="0cm" fo:margin-bottom="0.45cm" fo:text-align="center"/>
      <style:text-properties style:font-name="Bahnschrift" fo:font-size="12pt" fo:font-weight="bold" fo:color="#0891B2"/>
    </style:style>
    <style:style style:name="CoverMeta" style:family="paragraph">
      <style:paragraph-properties fo:margin-top="0cm" fo:margin-bottom="0.14cm" fo:text-align="center"/>
      <style:text-properties style:font-name="Aptos" fo:font-size="11pt" fo:color="#475569"/>
    </style:style>
    <style:style style:name="EyebrowCyan" style:family="paragraph">
      <style:paragraph-properties fo:margin-top="0.2cm" fo:margin-bottom="0.18cm"/>
      <style:text-properties style:font-name="Cascadia Code" fo:font-size="10pt" fo:font-weight="bold" fo:color="#0891B2"/>
    </style:style>
    <style:style style:name="EyebrowGreen" style:family="paragraph">
      <style:paragraph-properties fo:margin-top="0.2cm" fo:margin-bottom="0.18cm"/>
      <style:text-properties style:font-name="Cascadia Code" fo:font-size="10pt" fo:font-weight="bold" fo:color="#047857"/>
    </style:style>
    <style:style style:name="EyebrowAmber" style:family="paragraph">
      <style:paragraph-properties fo:margin-top="0.2cm" fo:margin-bottom="0.18cm"/>
      <style:text-properties style:font-name="Cascadia Code" fo:font-size="10pt" fo:font-weight="bold" fo:color="#B45309"/>
    </style:style>
    <style:style style:name="EyebrowCyanBreak" style:family="paragraph">
      <style:paragraph-properties fo:break-before="page" fo:margin-top="0.2cm" fo:margin-bottom="0.18cm"/>
      <style:text-properties style:font-name="Cascadia Code" fo:font-size="10pt" fo:font-weight="bold" fo:color="#0891B2"/>
    </style:style>
    <style:style style:name="EyebrowGreenBreak" style:family="paragraph">
      <style:paragraph-properties fo:break-before="page" fo:margin-top="0.2cm" fo:margin-bottom="0.18cm"/>
      <style:text-properties style:font-name="Cascadia Code" fo:font-size="10pt" fo:font-weight="bold" fo:color="#047857"/>
    </style:style>
    <style:style style:name="EyebrowAmberBreak" style:family="paragraph">
      <style:paragraph-properties fo:break-before="page" fo:margin-top="0.2cm" fo:margin-bottom="0.18cm"/>
      <style:text-properties style:font-name="Cascadia Code" fo:font-size="10pt" fo:font-weight="bold" fo:color="#B45309"/>
    </style:style>
    <style:style style:name="SlideTitle" style:family="paragraph">
      <style:paragraph-properties fo:margin-top="0cm" fo:margin-bottom="0.25cm" fo:keep-with-next="always"/>
      <style:text-properties style:font-name="Bahnschrift" fo:font-size="24pt" fo:font-weight="bold" fo:color="#0F172A"/>
    </style:style>
    <style:style style:name="SlideSubtitle" style:family="paragraph">
      <style:paragraph-properties fo:margin-top="0cm" fo:margin-bottom="1.05cm" fo:line-height="130%"/>
      <style:text-properties style:font-name="Aptos" fo:font-size="11.5pt" fo:color="#475569"/>
    </style:style>
    <style:style style:name="Bullet" style:family="paragraph">
      <style:paragraph-properties fo:margin-left="0.35cm" fo:margin-top="0cm" fo:margin-bottom="0.42cm" fo:line-height="135%"/>
      <style:text-properties style:font-name="Aptos" fo:font-size="13.4pt" fo:color="#0F172A"/>
    </style:style>
    <style:style style:name="SmallNote" style:family="paragraph">
      <style:paragraph-properties fo:margin-left="0.35cm" fo:margin-top="0.45cm" fo:margin-bottom="0.2cm" fo:line-height="130%"/>
      <style:text-properties style:font-name="Aptos" fo:font-size="11.5pt" fo:font-style="italic" fo:color="#64748B"/>
    </style:style>
    <style:style style:name="BlockTitleCyan" style:family="paragraph">
      <style:paragraph-properties fo:margin-top="0.15cm" fo:margin-bottom="0.28cm"/>
      <style:text-properties style:font-name="Cascadia Code" fo:font-size="10.5pt" fo:font-weight="bold" fo:color="#64748B"/>
    </style:style>
    <style:style style:name="BlockTitleGreen" style:family="paragraph">
      <style:paragraph-properties fo:margin-top="0.15cm" fo:margin-bottom="0.28cm"/>
      <style:text-properties style:font-name="Cascadia Code" fo:font-size="10.5pt" fo:font-weight="bold" fo:color="#64748B"/>
    </style:style>
    <style:style style:name="BlockTitleAmber" style:family="paragraph">
      <style:paragraph-properties fo:margin-top="0.15cm" fo:margin-bottom="0.28cm"/>
      <style:text-properties style:font-name="Cascadia Code" fo:font-size="10.5pt" fo:font-weight="bold" fo:color="#64748B"/>
    </style:style>
    <style:style style:name="Footer" style:family="paragraph">
      <style:paragraph-properties fo:margin-top="0cm" fo:margin-bottom="0cm" fo:text-align="center"/>
      <style:text-properties style:font-name="Cascadia Code" fo:font-size="7.5pt" fo:color="#64748B"/>
    </style:style>
    <style:style style:name="DotCyan" style:family="text">
      <style:text-properties fo:color="#0891B2" fo:font-weight="bold"/>
    </style:style>
    <style:style style:name="DotGreen" style:family="text">
      <style:text-properties fo:color="#047857" fo:font-weight="bold"/>
    </style:style>
    <style:style style:name="DotAmber" style:family="text">
      <style:text-properties fo:color="#B45309" fo:font-weight="bold"/>
    </style:style>
  </office:styles>
  <office:automatic-styles>
    <style:page-layout style:name="A4Portrait">
      <style:page-layout-properties fo:page-width="21cm" fo:page-height="29.7cm" style:print-orientation="portrait" fo:margin-top="1.45cm" fo:margin-bottom="1.45cm" fo:margin-left="1.65cm" fo:margin-right="1.65cm"/>
    </style:page-layout>
  </office:automatic-styles>
  <office:master-styles>
    <style:master-page style:name="Standard" style:page-layout-name="A4Portrait">
      <style:footer>
        <text:p text:style-name="Footer">Support jury - Épreuve E5 | Angoran Moyé Judes-Uriel Stéphanas | Page <text:page-number text:select-page="current">1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3">
  <office:meta>
    <meta:generator>Codex</meta:generator>
    <meta:title>Support jury E5 - Portrait</meta:title>
  </office:meta>
</office:document-meta>
</file>
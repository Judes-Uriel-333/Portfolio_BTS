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ce style:name="Bahnschrift" svg:font-family="Bahnschrift"/>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cm" style:contextual-spacing="false" fo:text-align="center" style:justify-single-word="false"/>
      <style:text-properties fo:color="#0f172a" loext:opacity="100%" style:font-name="Bahnschrift" fo:font-size="22pt" fo:font-weight="bold"/>
    </style:style>
    <style:style style:name="P2" style:family="paragraph" style:parent-style-name="Standard">
      <style:paragraph-properties fo:margin-top="0cm" fo:margin-bottom="0.18cm" style:contextual-spacing="false" fo:text-align="center" style:justify-single-word="false"/>
      <style:text-properties fo:color="#334155" loext:opacity="100%" style:font-name="Aptos" fo:font-size="11.5pt"/>
    </style:style>
    <style:style style:name="P3" style:family="paragraph" style:parent-style-name="Standard">
      <style:paragraph-properties fo:margin-top="0cm" fo:margin-bottom="0.45cm" style:contextual-spacing="false" fo:text-align="center" style:justify-single-word="false"/>
      <style:text-properties fo:color="#64748b" loext:opacity="100%" style:font-name="Aptos" fo:font-size="10pt" fo:font-style="italic"/>
    </style:style>
    <style:style style:name="P4" style:family="paragraph" style:parent-style-name="Standard" style:list-style-name="">
      <style:paragraph-properties fo:margin-top="0.48cm" fo:margin-bottom="0.161cm" style:contextual-spacing="false" fo:keep-with-next="always"/>
      <style:text-properties fo:color="#0f172a" loext:opacity="100%" style:font-name="Bahnschrift" fo:font-size="15.5pt" fo:font-weight="bold"/>
    </style:style>
    <style:style style:name="P5" style:family="paragraph" style:parent-style-name="Standard">
      <style:paragraph-properties fo:margin-top="0cm" fo:margin-bottom="0.18cm" style:contextual-spacing="false" fo:line-height="145%" fo:text-align="justify" style:justify-single-word="false"/>
      <style:text-properties fo:color="#111827" loext:opacity="100%" style:font-name="Aptos" fo:font-size="11pt"/>
    </style:style>
    <style:style style:name="T1" style:family="text">
      <style:text-properties officeooo:rsid="000f8461"/>
    </style:style>
    <style:style style:name="T2" style:family="text">
      <style:text-properties officeooo:rsid="00105f5d"/>
    </style:style>
    <style:style style:name="T3" style:family="text">
      <style:text-properties officeooo:rsid="001192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E5 - Document de validation</text:p>
      <text:p text:style-name="P2">Angoran Moyé Judes-Uriel Stéphanas - BTS SIO SLAM - Institut F2I</text:p>
      <text:p text:style-name="P3">Base courte et structurée pour préparer le futur diaporama PowerPoint.</text:p>
      <text:h text:style-name="P4" text:outline-level="1">Introduction</text:h>
      <text:p text:style-name="P5">Bonjour, je m'appelle Angoran Moye Judes-Uriel Stephanas. Je suis etudiant en BTS SIO option SLAM a l'Institut F2I, pour la session 2026. Aujourd'hui, je vais vous presenter mon parcours, mes competences et la logique de mon projet professionnel.</text:p>
      <text:p text:style-name="P5">Mon objectif n'est pas simplement de montrer des projets les uns apres les autres. Je veux surtout montrer comment mon parcours s'est construit progressivement : d'abord par l'apprentissage des bases, ensuite par les projets en formation, puis par les experiences professionnelles, la veille technologique et enfin mon orientation apres le BTS.</text:p>
      <text:h text:style-name="P4" text:outline-level="1">Profil personnel</text:h>
      <text:p text:style-name="P5">Je me presente comme un profil en construction serieuse. Je ne cherche pas a me presenter comme un expert, mais comme quelqu'un qui progresse avec methode et qui veut comprendre les fondations avant d'aller vers des sujets plus complexes.</text:p>
      <text:p text:style-name="P5">Ce qui m'interesse dans le developpement, ce n'est pas seulement l'apparence d'une application. C'est surtout la logique derriere : comprendre un besoin, organiser le code, faire circuler les donnees correctement et construire quelque chose de maintenable.</text:p>
      <text:h text:style-name="P4" text:outline-level="1">Parcours scolaire</text:h>
      <text:p text:style-name="P5">Avant le BTS, j'ai obtenu un baccalaureat scientifique. C'est ensuite que j'ai commenc<text:span text:style-name="T1">é</text:span> a m'interesser plus serieusement a la programmation, notamment avec Python. Cette phase m'a permis de decouvrir la logique algorithmique et la resolution de problemes.</text:p>
      <text:p text:style-name="P5">J'ai ensuite integre le BTS SIO option SLAM, qui correspond bien a mon profil parce qu'il est oriente vers le developpement d'applications, les bases de donnees, la conception de solutions et le travail en mode projet.</text:p>
      <text:p text:style-name="P5">Pendant cette formation, j'ai appris a mieux structurer mon raisonnement : partir d'un besoin, choisir une solution, developper, tester, documenter et presenter le resultat.</text:p>
      <text:h text:style-name="P4" text:outline-level="1">Stages et experiences professionnelles</text:h>
      <text:p text:style-name="P5">Mon experience chez A'Numerique a ete une etape importante, parce qu'elle m'a permis de passer d'un cadre scolaire a un contexte plus concret.</text:p>
      <text:p text:style-name="P5">Pendant mon stage de mai a juillet 2025, j'ai participe au developpement d'une plateforme web avec React.js et Next.js. J'ai travaille sur des fonctionnalites front-end, <text:soft-page-break/>mais aussi sur l'organisation du code et la lisibilite des composants.</text:p>
      <text:p text:style-name="P5">Ensuite, de decembre 2025 a janvier 2026, j'ai travaille sur un projet de plateforme d'agregation autour d'une page Salons d'emploi. Le besoin etait de recuperer, structurer, stocker et afficher des donnees dans un meme flux.</text:p>
      <text:p text:style-name="P5">Ce projet m'a marque parce qu'il m'a fait travailler une chaine complete : scraping, stockage, seeding puis affichage. Il m'a surtout appris qu'un projet reel ne depend pas seulement du code visible, mais aussi de la fiabilite des donnees et de la coherence entre les environnements.</text:p>
      <text:h text:style-name="P4" text:outline-level="1">Projets principaux</text:h>
      <text:p text:style-name="P5">Dans mes projets en formation, GameConnect est l'un des plus representatifs. C'est un reseau social de gamers developpe en PHP et MySQL, avec inscription, authentification, publications, likes, commentaires et edition de profil. Il m'a permis de travailler la logique back-end, les bases de donnees et les sessions utilisateur.</text:p>
      <text:p text:style-name="P5">J'ai aussi r<text:span text:style-name="T2">é</text:span>alis<text:span text:style-name="T2">é </text:span>un programme de hash en Python pour v<text:span text:style-name="T2">é</text:span>rifier l'int<text:span text:style-name="T2">é</text:span>grit<text:span text:style-name="T2">é</text:span> de fichiers avec SHA-256. Ce projet est plus simple visuellement, mais il m'a aid<text:span text:style-name="T2">é</text:span> a comprendre une notion importante en s<text:span text:style-name="T2">é</text:span>curit<text:span text:style-name="T2">é</text:span> : d<text:span text:style-name="T2">é</text:span>tecter si un fichier a <text:span text:style-name="T2">é</text:span>t<text:span text:style-name="T2">é</text:span> modifi<text:span text:style-name="T2">é</text:span>.</text:p>
      <text:p text:style-name="P5">Le portfolio est egalement un projet important, parce qu'il centralise mon profil, mon CV, mes projets, mes certifications, ma veille et mon tableau de synthese. Il montre aussi ma capacite a organiser mon identite professionnelle en ligne.</text:p>
      <text:p text:style-name="P5">Enfin, j'ai commence a travailler sur des projets personnels plus orientes donnees et intelligence artificielle, comme AIAuditOps et MailGuardAI. AIAuditOps concerne la gouvernance et l'audit de systemes IA. MailGuardAI est un MVP qui analyse des emails et les classe selon leur intention ou leur niveau de risque. Je les presente avec prudence : ils montrent surtout mon orientation et ma progression, sans pretendre que tout est finalise.</text:p>
      <text:h text:style-name="P4" text:outline-level="1">Certifications et apprentissages prevus</text:h>
      <text:p text:style-name="P5">Cote certifications, j'ai valide SecNumacademie de l'ANSSI, ce qui m'a permis de consolider mes bases en cybersecurite. J'ai aussi valide un cours OpenClassrooms sur les bases du langage Python.</text:p>
      <text:p text:style-name="P5">Pour la suite, je souhaite continuer a obtenir des certifications ou attestations dans les domaines qui correspondent a mon projet : React et Next.js pour consolider le d<text:span text:style-name="T3">é</text:span>v<text:span text:style-name="T3">é</text:span>loppement front-end, les fondamentaux de la cybers<text:span text:style-name="T3">é</text:span>curit<text:span text:style-name="T3">é</text:span>, Docker et les bases du cloud, ainsi que des contenus autour de l'intelligence artificielle appliqu<text:span text:style-name="T3">é</text:span>e.</text:p>
      <text:p text:style-name="P5">L'objectif n'est pas d'accumuler des certificats pour remplir un CV, mais de choisir des apprentissages coh<text:span text:style-name="T3">é</text:span>rents avec mon orientation : developper des applications utiles, fiables et capables d'exploiter les donnees.</text:p>
      <text:h text:style-name="P4" text:outline-level="1"><text:soft-page-break/>Veille technologique</text:h>
      <text:p text:style-name="P5">Ma veille technologique porte sur l'IA orient<text:span text:style-name="T3">ée</text:span> vers la d<text:span text:style-name="T3">é</text:span>fense des syst<text:span text:style-name="T3">è</text:span>mes informatiques. Ce sujet m'int<text:span text:style-name="T3">é</text:span>resse parce qu'il relie plusieurs domaines : la cybers<text:span text:style-name="T3">é</text:span>curit<text:span text:style-name="T3">é</text:span>, l'analyse de donn<text:span text:style-name="T3">é</text:span>es, l'automatisation et l'aide a la d<text:span text:style-name="T3">é</text:span>cision.</text:p>
      <text:p text:style-name="P5">Dans cette veille, je m'int<text:span text:style-name="T3">é</text:span>resse a la mani<text:span text:style-name="T3">è</text:span>re dont l'IA peut aider les <text:span text:style-name="T3">é</text:span>quipes de s<text:span text:style-name="T3">é</text:span>curit<text:span text:style-name="T3">é</text:span> a d<text:span text:style-name="T3">é</text:span>tecter des anomalies, prioriser des alertes, synth<text:span text:style-name="T3">ét</text:span>iser des incidents ou assister l'investigation.</text:p>
      <text:p text:style-name="P5">Mais je retiens aussi une limite importante : une IA utile en cyberd<text:span text:style-name="T3">é</text:span>fense ne doit pas d<text:span text:style-name="T3">é</text:span>cider seule. Elle doit aider l'humain, acc<text:span text:style-name="T3">é</text:span>l<text:span text:style-name="T3">é</text:span>rer l'analyse, laisser des traces v<text:span text:style-name="T3">é</text:span>rifiables et rester sous contr<text:span text:style-name="T3">ô</text:span>le.</text:p>
      <text:p text:style-name="P5">Cette veille est directement li<text:span text:style-name="T3">é</text:span>e a mon orientation, car elle me permet de mieux comprendre les enjeux de l'IA appliqu<text:span text:style-name="T3">é</text:span>e a des probl<text:span text:style-name="T3">è</text:span>mes r<text:span text:style-name="T3">é</text:span>els, notamment dans la s<text:span text:style-name="T3">é</text:span>curit<text:span text:style-name="T3">é</text:span> et la fiabilit<text:span text:style-name="T3">é</text:span> des syst<text:span text:style-name="T3">è</text:span>mes.</text:p>
      <text:h text:style-name="P4" text:outline-level="1">Orientation apr<text:span text:style-name="T3">è</text:span>s le BTS</text:h>
      <text:p text:style-name="P5">Apr<text:span text:style-name="T3">è</text:span>s le BTS, je souhaite poursuivre mes <text:span text:style-name="T3">é</text:span>tudes vers un dipl<text:span text:style-name="T3">ô</text:span>me de niveau Bac+3, de type Bachelor ou Licence professionnelle, dans <text:span text:style-name="T3">LA</text:span> fili<text:span text:style-name="T3">è</text:span>re data <text:span text:style-name="T3">IA</text:span>.</text:p>
      <text:p text:style-name="P5">A court terme, mon objectif est de renforcer mes competences techniques dans un cadre plus professionnel, idealement avec de l'alternance ou des projets concrets. Je veux continuer a progresser sur des applications reelles, avec une meilleure maitrise de l'architecture, des API, des donnees et de la securite.</text:p>
      <text:p text:style-name="P5">A moyen terme, je vise un profil de developpeur full-stack capable de comprendre un produit dans son ensemble : l'interface, le back-end, les donnees, les utilisateurs et les contraintes metier.</text:p>
      <text:p text:style-name="P5">A long terme, mon ambition est de monter une startup. Je ne vois pas cette ambition comme quelque chose d'immediat ou d'improvise. Je la vois plutot comme un objectif a construire progressivement, en apprenant a developper des solutions utiles, a comprendre les besoins reels et a transformer une idee en produit solide.</text:p>
      <text:p text:style-name="P5">L'orientation qui m'attire le plus aujourd'hui se situe autour des solutions numeriques utiles, de l'automatisation, de la donnee, de l'IA appliquee et de la securite. C'est dans cette direction que je souhaite continuer a avancer apres le BTS.</text:p>
      <text:h text:style-name="P4" text:outline-level="1">Conclusion</text:h>
      <text:p text:style-name="P5">Pour conclure, mon parcours montre une progression construite par les projets. J'ai commence par les bases, puis j'ai avance vers des projets plus structures, des experiences professionnelles et une reflexion plus claire sur mon avenir.</text:p>
      <text:p text:style-name="P5">Ce que je veux faire ressortir devant le jury, c'est que mon portfolio n'est pas seulement <text:soft-page-break/>une vitrine. C'est un outil qui montre mon evolution, mes competences, mes limites actuelles et mon orientation.</text:p>
      <text:p text:style-name="P5">Aujourd'hui, je veux continuer a progresser dans le developpement applicatif, avec une ouverture forte vers les donnees, l'intelligence artificielle et la securite. Mon objectif final est de construire, a terme, des solutions utiles et solides, jusqu'a pouvoir porter mon propre projet entrepreneuri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ce style:name="Bahnschrift" svg:font-family="Bahnschrift"/>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cm" fo:margin-bottom="1.7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title>Présentation E5 - Document de validation</meta:title>
    <dc:date>2026-05-03T18:31:21.692437500</dc:date>
    <meta:editing-duration>PT2H49M49S</meta:editing-duration>
    <meta:editing-cycles>1</meta:editing-cycles>
    <meta:document-statistic meta:table-count="0" meta:image-count="0" meta:object-count="0" meta:page-count="4" meta:paragraph-count="42" meta:word-count="1180" meta:character-count="7775" meta:non-whitespace-character-count="6637"/>
  </office:meta>
</office:document-meta>
</file>